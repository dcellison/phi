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B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1.3583in"/>
    </style:style>
    <style:style style:name="Table3.C" style:family="table-column">
      <style:table-column-properties style:column-width="1.3542in"/>
    </style:style>
    <style:style style:name="Table3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style:min-row-height="0.0007in" fo:keep-together="auto"/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4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1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2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3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4" style:family="paragraph" style:parent-style-name="Example">
      <style:paragraph-properties fo:break-before="page"/>
      <style:text-properties officeooo:paragraph-rsid="004f26e4"/>
    </style:style>
    <style:style style:name="P25" style:family="paragraph" style:parent-style-name="Table">
      <style:paragraph-properties fo:break-before="page" fo:keep-with-next="always"/>
    </style:style>
    <style:style style:name="P26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27" style:family="paragraph" style:parent-style-name="Example">
      <style:text-properties officeooo:paragraph-rsid="0077dcd7"/>
    </style:style>
    <style:style style:name="P28" style:family="paragraph" style:parent-style-name="Example">
      <style:text-properties fo:font-style="italic" officeooo:paragraph-rsid="0077dcd7" style:font-style-asian="italic" style:font-style-complex="italic"/>
    </style:style>
    <style:style style:name="P29" style:family="paragraph" style:parent-style-name="Heading_20_1" style:list-style-name="">
      <style:text-properties officeooo:paragraph-rsid="005fdfa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Heading_20_1">
      <style:paragraph-properties fo:break-before="page"/>
      <style:text-properties officeooo:rsid="003b443c" officeooo:paragraph-rsid="003b443c"/>
    </style:style>
    <style:style style:name="P32" style:family="paragraph" style:parent-style-name="Heading_20_1">
      <style:paragraph-properties fo:break-before="page"/>
      <style:text-properties officeooo:paragraph-rsid="005fdfae"/>
    </style:style>
    <style:style style:name="P33" style:family="paragraph" style:parent-style-name="Standard">
      <style:text-properties officeooo:rsid="00711222" officeooo:paragraph-rsid="00740221"/>
    </style:style>
    <style:style style:name="P34" style:family="paragraph" style:parent-style-name="Standard">
      <style:text-properties officeooo:rsid="0075fc9d" officeooo:paragraph-rsid="008dbd64"/>
    </style:style>
    <style:style style:name="P35" style:family="paragraph" style:parent-style-name="Standard">
      <style:text-properties style:font-name="Palatino Linotype" officeooo:rsid="0075fc9d" officeooo:paragraph-rsid="00762e79"/>
    </style:style>
    <style:style style:name="P36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37" style:family="paragraph" style:parent-style-name="Standard">
      <style:paragraph-properties fo:margin-top="0in" fo:margin-bottom="0.2in" style:contextual-spacing="false"/>
      <style:text-properties style:font-name="Palatino Linotype" officeooo:rsid="006f0a6a" officeooo:paragraph-rsid="006f0a6a"/>
    </style:style>
    <style:style style:name="P38" style:family="paragraph" style:parent-style-name="Standard">
      <style:paragraph-properties fo:margin-top="0in" fo:margin-bottom="0.2in" style:contextual-spacing="false" fo:break-before="page"/>
      <style:text-properties style:font-name="Palatino Linotype" officeooo:rsid="0070e4dc" officeooo:paragraph-rsid="00740221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c986" officeooo:paragraph-rsid="007dc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7d8821" officeooo:paragraph-rsid="007d88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7d8821" officeooo:paragraph-rsid="007d8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ngwar">
      <style:text-properties fo:font-size="36pt" style:font-size-asian="36pt" style:font-size-complex="36pt"/>
    </style:style>
    <style:style style:name="P48" style:family="paragraph" style:parent-style-name="Tengwar">
      <style:text-properties fo:font-size="36pt" officeooo:rsid="007716af" officeooo:paragraph-rsid="007716af" style:font-size-asian="36pt" style:font-size-complex="36pt"/>
    </style:style>
    <style:style style:name="P49" style:family="paragraph" style:parent-style-name="Tengwar">
      <style:text-properties officeooo:paragraph-rsid="0077dcd7"/>
    </style:style>
    <style:style style:name="P50" style:family="paragraph" style:parent-style-name="Tengwar">
      <style:text-properties officeooo:paragraph-rsid="007a0c23"/>
    </style:style>
    <style:style style:name="P51" style:family="paragraph" style:parent-style-name="Tengwar">
      <style:text-properties officeooo:rsid="002f6327" officeooo:paragraph-rsid="007a0c23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fo:font-style="normal" officeooo:rsid="0077dcd7" style:font-size-asian="22pt" style:font-style-asian="normal" style:font-size-complex="22pt" style:font-style-complex="normal"/>
    </style:style>
    <style:style style:name="T4" style:family="text">
      <style:text-properties style:font-name="Tengwar Telcontar" fo:font-size="22pt" fo:letter-spacing="normal" officeooo:rsid="002fa56f" style:font-size-asian="22pt" style:font-size-complex="22pt"/>
    </style:style>
    <style:style style:name="T5" style:family="text">
      <style:text-properties style:font-name="Tengwar Telcontar" fo:font-size="22pt" fo:letter-spacing="normal" officeooo:rsid="00340f5e" style:font-size-asian="22pt" style:font-size-complex="22pt"/>
    </style:style>
    <style:style style:name="T6" style:family="text">
      <style:text-properties style:font-name="Tengwar Telcontar" fo:font-size="22pt" fo:letter-spacing="normal" officeooo:rsid="0077dcd7" style:font-size-asian="22pt" style:font-size-complex="22pt"/>
    </style:style>
    <style:style style:name="T7" style:family="text">
      <style:text-properties style:font-name="Tengwar Telcontar" fo:font-size="22pt" fo:letter-spacing="normal" officeooo:rsid="0079473b" style:font-size-asian="22pt" style:font-size-complex="22pt"/>
    </style:style>
    <style:style style:name="T8" style:family="text">
      <style:text-properties officeooo:rsid="001f77f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bf0c" style:font-style-asian="italic" style:font-style-complex="italic"/>
    </style:style>
    <style:style style:name="T11" style:family="text">
      <style:text-properties fo:font-style="italic" officeooo:rsid="0032b8f3" style:font-style-asian="italic" style:font-style-complex="italic"/>
    </style:style>
    <style:style style:name="T12" style:family="text">
      <style:text-properties fo:font-style="italic" officeooo:rsid="002f6327" style:font-style-asian="italic" style:font-style-complex="italic"/>
    </style:style>
    <style:style style:name="T13" style:family="text">
      <style:text-properties fo:font-style="italic" officeooo:rsid="00434435" style:font-style-asian="italic" style:font-style-complex="italic"/>
    </style:style>
    <style:style style:name="T14" style:family="text">
      <style:text-properties fo:font-style="italic" officeooo:rsid="00530507" style:font-style-asian="italic" style:font-style-complex="italic"/>
    </style:style>
    <style:style style:name="T15" style:family="text">
      <style:text-properties fo:font-style="italic" officeooo:rsid="0070e4dc" style:font-style-asian="italic" style:font-style-complex="italic"/>
    </style:style>
    <style:style style:name="T16" style:family="text">
      <style:text-properties fo:font-style="italic" officeooo:rsid="00340f5e" style:font-style-asian="italic" style:font-style-complex="italic"/>
    </style:style>
    <style:style style:name="T17" style:family="text">
      <style:text-properties fo:font-style="italic" officeooo:rsid="0077dcd7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2f95" style:font-style-asian="normal" style:font-style-complex="normal"/>
    </style:style>
    <style:style style:name="T20" style:family="text">
      <style:text-properties fo:font-style="normal" officeooo:rsid="002b0442" style:font-style-asian="normal" style:font-style-complex="normal"/>
    </style:style>
    <style:style style:name="T21" style:family="text">
      <style:text-properties fo:font-style="normal" officeooo:rsid="002f6327" style:font-style-asian="normal" style:font-style-complex="normal"/>
    </style:style>
    <style:style style:name="T22" style:family="text">
      <style:text-properties fo:font-style="normal" officeooo:rsid="00434435" style:font-style-asian="normal" style:font-style-complex="normal"/>
    </style:style>
    <style:style style:name="T23" style:family="text">
      <style:text-properties fo:font-style="normal" officeooo:rsid="004ca095" style:font-style-asian="normal" style:font-style-complex="normal"/>
    </style:style>
    <style:style style:name="T24" style:family="text">
      <style:text-properties fo:font-style="normal" officeooo:rsid="004e5177" style:font-style-asian="normal" style:font-style-complex="normal"/>
    </style:style>
    <style:style style:name="T25" style:family="text">
      <style:text-properties fo:font-style="normal" officeooo:rsid="0041eff8" style:font-style-asian="normal" style:font-style-complex="normal"/>
    </style:style>
    <style:style style:name="T26" style:family="text">
      <style:text-properties fo:font-style="normal" officeooo:rsid="004f26e4" style:font-style-asian="normal" style:font-style-complex="normal"/>
    </style:style>
    <style:style style:name="T27" style:family="text">
      <style:text-properties fo:font-style="normal" officeooo:rsid="0051e91f" style:font-style-asian="normal" style:font-style-complex="normal"/>
    </style:style>
    <style:style style:name="T28" style:family="text">
      <style:text-properties fo:font-style="normal" officeooo:rsid="00530507" style:font-style-asian="normal" style:font-style-complex="normal"/>
    </style:style>
    <style:style style:name="T29" style:family="text">
      <style:text-properties fo:font-style="normal" officeooo:rsid="0054cfe5" style:font-style-asian="normal" style:font-style-complex="normal"/>
    </style:style>
    <style:style style:name="T30" style:family="text">
      <style:text-properties fo:font-style="normal" officeooo:rsid="005648a8" style:font-style-asian="normal" style:font-style-complex="normal"/>
    </style:style>
    <style:style style:name="T31" style:family="text">
      <style:text-properties fo:font-style="normal" officeooo:rsid="006b06df" style:font-style-asian="normal" style:font-style-complex="normal"/>
    </style:style>
    <style:style style:name="T32" style:family="text">
      <style:text-properties fo:font-style="normal" officeooo:rsid="006c6dbb" style:font-style-asian="normal" style:font-style-complex="normal"/>
    </style:style>
    <style:style style:name="T33" style:family="text">
      <style:text-properties fo:font-style="normal" officeooo:rsid="0070e4dc" style:font-style-asian="normal" style:font-style-complex="normal"/>
    </style:style>
    <style:style style:name="T34" style:family="text">
      <style:text-properties fo:font-style="normal" officeooo:rsid="00340f5e" style:font-style-asian="normal" style:font-style-complex="normal"/>
    </style:style>
    <style:style style:name="T35" style:family="text">
      <style:text-properties fo:font-style="normal" officeooo:rsid="0072236d" style:font-style-asian="normal" style:font-style-complex="normal"/>
    </style:style>
    <style:style style:name="T36" style:family="text">
      <style:text-properties fo:font-style="normal" officeooo:rsid="00740221" style:font-style-asian="normal" style:font-style-complex="normal"/>
    </style:style>
    <style:style style:name="T37" style:family="text">
      <style:text-properties fo:font-style="normal" officeooo:rsid="0079473b" style:font-style-asian="normal" style:font-style-complex="normal"/>
    </style:style>
    <style:style style:name="T38" style:family="text">
      <style:text-properties fo:font-style="normal" officeooo:rsid="007b3ef4" style:font-style-asian="normal" style:font-style-complex="normal"/>
    </style:style>
    <style:style style:name="T39" style:family="text">
      <style:text-properties fo:font-style="normal" officeooo:rsid="007dc986" style:font-style-asian="normal" style:font-style-complex="normal"/>
    </style:style>
    <style:style style:name="T40" style:family="text">
      <style:text-properties fo:font-style="normal" officeooo:rsid="00816a0e" style:font-style-asian="normal" style:font-style-complex="normal"/>
    </style:style>
    <style:style style:name="T41" style:family="text">
      <style:text-properties fo:font-style="normal" officeooo:rsid="008637b5" style:font-style-asian="normal" style:font-style-complex="normal"/>
    </style:style>
    <style:style style:name="T42" style:family="text">
      <style:text-properties officeooo:rsid="0023afad"/>
    </style:style>
    <style:style style:name="T43" style:family="text">
      <style:text-properties style:font-name="Palatino Linotype1" fo:font-size="12pt" fo:letter-spacing="normal" officeooo:rsid="001f77fd" style:font-size-asian="10.5pt" style:font-size-complex="12pt"/>
    </style:style>
    <style:style style:name="T44" style:family="text">
      <style:text-properties style:font-name="Palatino Linotype1" fo:font-size="12pt" fo:letter-spacing="normal" officeooo:rsid="003079ad" style:font-size-asian="10.5pt" style:font-size-complex="12pt"/>
    </style:style>
    <style:style style:name="T45" style:family="text">
      <style:text-properties style:font-name="Palatino Linotype1" fo:font-size="12pt" fo:letter-spacing="normal" officeooo:rsid="0077dcd7" style:font-size-asian="10.5pt" style:font-size-complex="12pt"/>
    </style:style>
    <style:style style:name="T46" style:family="text">
      <style:text-properties style:font-name="Palatino Linotype1" fo:font-size="12pt" fo:letter-spacing="normal" officeooo:rsid="00846372" style:font-size-asian="10.5pt" style:font-size-complex="12pt"/>
    </style:style>
    <style:style style:name="T47" style:family="text">
      <style:text-properties style:font-name="Palatino Linotype1" fo:font-size="12pt" officeooo:rsid="002aebfd" style:font-size-asian="10.5pt" style:font-size-complex="12pt"/>
    </style:style>
    <style:style style:name="T48" style:family="text">
      <style:text-properties style:font-name="Palatino Linotype1" fo:font-size="12pt" officeooo:rsid="0054cfe5" style:font-size-asian="10.5pt" style:font-size-complex="12pt"/>
    </style:style>
    <style:style style:name="T49" style:family="text">
      <style:text-properties style:font-name="Palatino Linotype1" fo:font-size="12pt" officeooo:rsid="005a0109" style:font-size-asian="10.5pt" style:font-size-complex="12pt"/>
    </style:style>
    <style:style style:name="T50" style:family="text">
      <style:text-properties style:font-name="Palatino Linotype1" fo:font-size="12pt" officeooo:rsid="005bff1b" style:font-size-asian="10.5pt" style:font-size-complex="12pt"/>
    </style:style>
    <style:style style:name="T51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52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53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54" style:family="text">
      <style:text-properties officeooo:rsid="0028e509"/>
    </style:style>
    <style:style style:name="T55" style:family="text">
      <style:text-properties officeooo:rsid="002f6327"/>
    </style:style>
    <style:style style:name="T56" style:family="text">
      <style:text-properties officeooo:rsid="0032b8f3"/>
    </style:style>
    <style:style style:name="T57" style:family="text">
      <style:text-properties style:font-name="Palatino Linotype"/>
    </style:style>
    <style:style style:name="T58" style:family="text">
      <style:text-properties style:font-name="Palatino Linotype" fo:font-style="italic" officeooo:rsid="00340f5e" style:font-style-asian="italic" style:font-style-complex="italic"/>
    </style:style>
    <style:style style:name="T59" style:family="text">
      <style:text-properties style:font-name="Palatino Linotype" fo:font-style="italic" officeooo:rsid="0075fc9d" style:font-style-asian="italic" style:font-style-complex="italic"/>
    </style:style>
    <style:style style:name="T60" style:family="text">
      <style:text-properties style:font-name="Palatino Linotype" officeooo:rsid="003ee6d6"/>
    </style:style>
    <style:style style:name="T61" style:family="text">
      <style:text-properties style:font-name="Palatino Linotype" officeooo:rsid="004ca095"/>
    </style:style>
    <style:style style:name="T62" style:family="text">
      <style:text-properties style:font-name="Palatino Linotype" fo:font-size="10pt" officeooo:rsid="0051e91f" style:font-size-asian="10pt" style:font-size-complex="10pt"/>
    </style:style>
    <style:style style:name="T63" style:family="text">
      <style:text-properties style:font-name="Palatino Linotype" fo:font-size="10pt" officeooo:rsid="00631a01" style:font-size-asian="10pt" style:font-size-complex="10pt"/>
    </style:style>
    <style:style style:name="T64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65" style:family="text">
      <style:text-properties style:font-name="Palatino Linotype" officeooo:rsid="005bff1b"/>
    </style:style>
    <style:style style:name="T66" style:family="text">
      <style:text-properties style:font-name="Palatino Linotype" officeooo:rsid="005dfc65"/>
    </style:style>
    <style:style style:name="T67" style:family="text">
      <style:text-properties style:font-name="Palatino Linotype" fo:font-style="normal" style:font-style-asian="normal" style:font-style-complex="normal"/>
    </style:style>
    <style:style style:name="T68" style:family="text">
      <style:text-properties style:font-name="Palatino Linotype" officeooo:rsid="00740221"/>
    </style:style>
    <style:style style:name="T69" style:family="text">
      <style:text-properties style:font-name="Palatino Linotype" officeooo:rsid="0075fc9d"/>
    </style:style>
    <style:style style:name="T70" style:family="text">
      <style:text-properties style:font-name="Palatino Linotype" officeooo:rsid="00762e79"/>
    </style:style>
    <style:style style:name="T71" style:family="text">
      <style:text-properties style:font-name="Palatino Linotype" officeooo:rsid="007a0c23"/>
    </style:style>
    <style:style style:name="T72" style:family="text">
      <style:text-properties style:font-name="Palatino Linotype" officeooo:rsid="008668ad"/>
    </style:style>
    <style:style style:name="T73" style:family="text">
      <style:text-properties style:font-name="Palatino Linotype" officeooo:rsid="00876d12"/>
    </style:style>
    <style:style style:name="T74" style:family="text">
      <style:text-properties style:font-name="Palatino Linotype" officeooo:rsid="00885bcb"/>
    </style:style>
    <style:style style:name="T75" style:family="text">
      <style:text-properties style:font-name="Palatino Linotype" officeooo:rsid="008a59b7"/>
    </style:style>
    <style:style style:name="T76" style:family="text">
      <style:text-properties style:font-name="Palatino Linotype" officeooo:rsid="008c5f65"/>
    </style:style>
    <style:style style:name="T77" style:family="text">
      <style:text-properties style:font-name="Palatino Linotype" officeooo:rsid="009112a8"/>
    </style:style>
    <style:style style:name="T78" style:family="text">
      <style:text-properties officeooo:rsid="003eb40c"/>
    </style:style>
    <style:style style:name="T79" style:family="text">
      <style:text-properties officeooo:rsid="003ee6d6"/>
    </style:style>
    <style:style style:name="T80" style:family="text">
      <style:text-properties fo:font-variant="small-caps" style:font-name="Palatino Linotype1" fo:font-size="12pt" officeooo:rsid="002aebfd" style:font-size-asian="10.5pt" style:font-size-complex="12pt"/>
    </style:style>
    <style:style style:name="T81" style:family="text">
      <style:text-properties officeooo:rsid="0041eff8"/>
    </style:style>
    <style:style style:name="T82" style:family="text">
      <style:text-properties officeooo:rsid="00434435"/>
    </style:style>
    <style:style style:name="T83" style:family="text">
      <style:text-properties officeooo:rsid="004a8779"/>
    </style:style>
    <style:style style:name="T84" style:family="text">
      <style:text-properties officeooo:rsid="004ca095"/>
    </style:style>
    <style:style style:name="T85" style:family="text">
      <style:text-properties officeooo:rsid="004e5177"/>
    </style:style>
    <style:style style:name="T86" style:family="text">
      <style:text-properties officeooo:rsid="0050274c"/>
    </style:style>
    <style:style style:name="T87" style:family="text">
      <style:text-properties officeooo:rsid="0051e91f"/>
    </style:style>
    <style:style style:name="T88" style:family="text">
      <style:text-properties officeooo:rsid="00631a01"/>
    </style:style>
    <style:style style:name="T89" style:family="text">
      <style:text-properties officeooo:rsid="0067ded3"/>
    </style:style>
    <style:style style:name="T90" style:family="text">
      <style:text-properties officeooo:rsid="0072236d"/>
    </style:style>
    <style:style style:name="T91" style:family="text">
      <style:text-properties officeooo:rsid="0075fc9d"/>
    </style:style>
    <style:style style:name="T92" style:family="text">
      <style:text-properties officeooo:rsid="00762e79"/>
    </style:style>
    <style:style style:name="T93" style:family="text">
      <style:text-properties officeooo:rsid="007716af"/>
    </style:style>
    <style:style style:name="T94" style:family="text">
      <style:text-properties officeooo:rsid="0077dcd7"/>
    </style:style>
    <style:style style:name="T95" style:family="text">
      <style:text-properties officeooo:rsid="0079473b"/>
    </style:style>
    <style:style style:name="T96" style:family="text">
      <style:text-properties style:font-name="Tengwar Telcontar:=31" fo:font-size="22pt" fo:letter-spacing="normal" officeooo:rsid="0079473b" style:font-size-asian="22pt" style:font-size-complex="22pt"/>
    </style:style>
    <style:style style:name="T97" style:family="text">
      <style:text-properties style:font-name="Tengwar Telcontar:=31" fo:font-size="22pt" fo:letter-spacing="normal" fo:font-style="normal" officeooo:rsid="0079473b" style:font-size-asian="22pt" style:font-style-asian="normal" style:font-size-complex="22pt" style:font-style-complex="normal"/>
    </style:style>
    <style:style style:name="T98" style:family="text">
      <style:text-properties style:font-name="Tengwar Telcontar:=31" fo:letter-spacing="normal" officeooo:rsid="007a0c23"/>
    </style:style>
    <style:style style:name="T99" style:family="text">
      <style:text-properties officeooo:rsid="007a6ac4"/>
    </style:style>
    <style:style style:name="T100" style:family="text">
      <style:text-properties officeooo:rsid="007d8821"/>
    </style:style>
    <style:style style:name="T101" style:family="text">
      <style:text-properties officeooo:rsid="007fb96c"/>
    </style:style>
    <style:style style:name="T102" style:family="text">
      <style:text-properties officeooo:rsid="00828690"/>
    </style:style>
    <style:style style:name="T103" style:family="text">
      <style:text-properties officeooo:rsid="00875571"/>
    </style:style>
    <style:style style:name="T104" style:family="text">
      <style:text-properties officeooo:rsid="00876d12"/>
    </style:style>
    <style:style style:name="T105" style:family="text">
      <style:text-properties officeooo:rsid="00885bcb"/>
    </style:style>
    <style:style style:name="T106" style:family="text">
      <style:text-properties officeooo:rsid="008a59b7"/>
    </style:style>
    <style:style style:name="T107" style:family="text">
      <style:text-properties officeooo:rsid="008c5f65"/>
    </style:style>
    <style:style style:name="T108" style:family="text">
      <style:text-properties officeooo:rsid="009112a8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1">φ</text:p>
      <text:p text:style-name="P5"/>
      <text:p text:style-name="P7">Phi</text:p>
      <text:p text:style-name="P8">A constructed language</text:p>
      <text:p text:style-name="P6"/>
      <text:p text:style-name="P9">Daniel Ellison</text:p>
      <text:p text:style-name="P10"/>
      <text:p text:style-name="P9"><text:date style:data-style-name="N76" text:date-value="2021-04-14T11:03:04.139000298">April 14, 2021</text:date></text:p>
      <text:h text:style-name="P30" text:outline-level="1">Introduction</text:h>
      <text:p text:style-name="First_20_Paragraph"><text:span text:style-name="T80">Phi</text:span><text:span text:style-name="T47"> is a constructed language. </text:span><text:span text:style-name="T49">A constructed language is one whose phonology, grammar, and vocabulary, instead of having developed naturally, are consciously devised</text:span><text:span text:style-name="T49"><text:note text:id="ftn1" text:note-class="footnote"><text:note-citation>1</text:note-citation><text:note-body><text:p text:style-name="Footnote">https://en.wikipedia.org/wiki/Constructed_language</text:p></text:note-body></text:note></text:span><text:span text:style-name="T49">. </text:span><text:span text:style-name="T48">The sound of </text:span><text:span text:style-name="T50">the </text:span><text:span text:style-name="T47">name </text:span><text:span text:style-name="T52">Phi</text:span><text:span text:style-name="T47"> embodies the simplicity and softness of the language itself. </text:span><text:span text:style-name="T51">Phi</text:span><text:span text:style-name="T53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8"> – </text:span><text:span text:style-name="T20">Wiktionary</text:span><text:span text:style-name="T20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10">p</text:span><text:span text:style-name="T9">hi</text:span> is one of the fundamental characteristics of nature; in the language Phi, nature is fundamental to its being. Listening to spoken Phi one <text:span text:style-name="T65">is </text:span><text:span text:style-name="T66">sometimes</text:span> reminded of the sounds of the natural world. There is also a musicality and rhythm to sentences in the language.</text:p>
      <text:h text:style-name="P31" text:outline-level="1">The Tengwar</text:h>
      <text:p text:style-name="First_20_Paragraph">Phi can be written in <text:span text:style-name="T61">either</text:span> of two ways: using the standard Latin alphabet or the Tengwar script. <text:span text:style-name="T84">Tengwar was</text:span> invented by J. R. R. Tolkien and <text:span text:style-name="T78">first described in </text:span>Appendix E of <text:span text:style-name="T78">the third book in his trilogy, </text:span><text:span text:style-name="T9">The Lord of the Rings</text:span>. <text:span text:style-name="T78">There are numerous sources of information </text:span><text:span text:style-name="T79">available </text:span><text:span text:style-name="T60">concerning </text:span><text:span text:style-name="T78">the Tengwar so details </text:span><text:span text:style-name="T99">and history </text:span><text:span text:style-name="T78">of the script will not be explored here.</text:span></text:p>
      <text:p text:style-name="P12">The look and feel of the Tengwar characters (<text:span text:style-name="T9">tengwa</text:span>) and its diacritical marks (<text:span text:style-name="T9">tehta</text:span>) <text:span text:style-name="T81">match the idea</text:span><text:span text:style-name="T84">l</text:span><text:span text:style-name="T81">s and philosoph</text:span><text:span text:style-name="T84">ies</text:span><text:span text:style-name="T81"> behind this language. Phi has a small set of consonants and vowels so it is relatively straightforward to map its </text:span><text:span text:style-name="T26">graphemes</text:span><text:span text:style-name="T81"> to Tengwar characters.</text:span><text:span text:style-name="T82"> The </text:span><text:span text:style-name="T85">Unicode </text:span><text:span text:style-name="T82">font </text:span><text:span text:style-name="T13">Tengwar Telcontar</text:span><text:span text:style-name="T22"><text:note text:id="ftn3" text:note-class="footnote"><text:note-citation>3</text:note-citation><text:note-body><text:p text:style-name="P4">http://freetengwar.sourceforge.net/tengtelc.html</text:p></text:note-body></text:note></text:span><text:span text:style-name="T22"> is used in this manual to render Phi text in Tengwar script. </text:span><text:span text:style-name="T23">A </text:span><text:span text:style-name="T24">custom keyboard layout</text:span><text:span text:style-name="T24"><text:note text:id="ftn4" text:note-class="footnote"><text:note-citation>4</text:note-citation><text:note-body><text:p text:style-name="P2">http://freetengwar.sourceforge.net/keylayouts.html</text:p></text:note-body></text:note></text:span><text:span text:style-name="T24"> was </text:span><text:span text:style-name="T30">employed</text:span><text:span text:style-name="T24"> to facilitate typing the Teng</text:span><text:span text:style-name="T30">w</text:span><text:span text:style-name="T24">ar characters.</text:span></text:p>
      <text:p text:style-name="P36"><text:span text:style-name="T25">Table</text:span><text:span text:style-name="T39">s</text:span><text:span text:style-name="T25"> </text:span><text:span text:style-name="T29">1 </text:span><text:span text:style-name="T39">and 2 </text:span><text:span text:style-name="T25">outline </text:span><text:span text:style-name="T22">th</text:span><text:span text:style-name="T24">e</text:span><text:span text:style-name="T22"> mapping </text:span><text:span text:style-name="T24">between the </text:span><text:span text:style-name="T26">graphemes</text:span><text:span text:style-name="T24"> used in Phi and </text:span><text:span text:style-name="T31">the </text:span><text:span text:style-name="T24">corresponding Tengwar characters, </text:span><text:span text:style-name="T26">as well as the key</text:span><text:span text:style-name="T32">presse</text:span><text:span text:style-name="T27">s necessary to </text:span><text:span text:style-name="T26">produce the characters using the font and ke</text:span><text:span text:style-name="T32">y</text:span><text:span text:style-name="T26">board layout mentioned previously. </text:span><text:span text:style-name="T27">An application or utility that </text:span><text:span text:style-name="T28">supports Graphite fonts</text:span><text:span text:style-name="T28"><text:note text:id="ftn5" text:note-class="footnote"><text:note-citation>5</text:note-citation><text:note-body><text:p text:style-name="P2">https://scripts.sil.org/cms/scripts/page.php?site_id=projects&amp;item_id=graphite_fonts</text:p></text:note-body></text:note></text:span><text:span text:style-name="T28"> is required for the font to render correctly. This manual was produced using LibreOffice Writer v7.1.2.2, which renders </text:span><text:span text:style-name="T14">Tengwar Telcontar</text:span><text:span text:style-name="T28"> properly. A link to details of this requirement can be found in the first footnote below.</text:span></text:p>
      <text:p text:style-name="P37"><text:span text:style-name="T18">Written </text:span><text:span text:style-name="T28">P</text:span><text:span text:style-name="T18">hi uses the Tengwar’s Quenya mode. Vowel </text:span><text:span text:style-name="T38">diacriticals</text:span><text:span text:style-name="T18"> are placed on the consonant that precedes the vowel. Since all Phi words start with a consonant, there is </text:span><text:span text:style-name="T38">never a</text:span><text:span text:style-name="T18"> need to use a</text:span><text:span text:style-name="T41">n initial</text:span><text:span text:style-name="T18"> vowel carrier. Words in Phi </text:span><text:span text:style-name="T33">often</text:span><text:span text:style-name="T18"> contain two consecutive vowels, but a vowel carrier is still unnecessary: the second vowel </text:span><text:span text:style-name="T40">is</text:span><text:span text:style-name="T18"> placed below the </text:span><text:span text:style-name="T33">same </text:span><text:span text:style-name="T18">consonant. The letters wou</text:span><text:span text:style-name="T35">l</text:span><text:span text:style-name="T18">d </text:span><text:span text:style-name="T33">then </text:span><text:span text:style-name="T18">be read as consonant, upper vowel, lower vowel. </text:span><text:span text:style-name="T33">This and the use of a single Tengwar character for consonant doubles such as </text:span><text:span text:style-name="T15">ph</text:span><text:span text:style-name="T33"> or </text:span><text:span text:style-name="T15">sh</text:span><text:span text:style-name="T33"> cause Phi </text:span><text:span text:style-name="T18">script </text:span><text:span text:style-name="T33">to be very compact and efficient.</text:span></text:p>
      <text:p text:style-name="P38"><text:span text:style-name="T33">T</text:span><text:span text:style-name="T18">he Phi word for “</text:span><text:span text:style-name="T36">love</text:span><text:span text:style-name="T18">” is </text:span><text:span text:style-name="T16">lothea</text:span><text:span text:style-name="T34">. </text:span><text:span text:style-name="T18">In </text:span><text:span text:style-name="T37">the</text:span><text:span text:style-name="T18"> Tengwar script it looks like this:</text:span></text:p>
      <text:p text:style-name="P47"><text:tab/><text:tab/></text:p>
      <text:p text:style-name="P33">A <text:span text:style-name="T68">six</text:span>-letter word in latin characters requires only two <text:span text:style-name="T9">tengwa</text:span> to represent <text:span text:style-name="T70">it</text:span>. Many words in Phi are two to three characters long. This occurs mainly with parts of speech such as particles, prepositions, or pronouns. These words are <text:span text:style-name="T68">almost </text:span><text:span text:style-name="T72">always</text:span> a single <text:span text:style-name="T59">tengwa</text:span> <text:span text:style-name="T90">with diacriticals </text:span>in <text:span text:style-name="T77">the</text:span> Tengwar. <text:span text:style-name="T91">All of this results in a very compact but clear Phi </text:span><text:span text:style-name="T69">writing system.</text:span></text:p>
      <text:p text:style-name="P35"><text:span text:style-name="T92">This is the phrase</text:span> “<text:span text:style-name="T18">I love you”</text:span> <text:span text:style-name="T92">i</text:span>n its simplest vernacular form <text:span text:style-name="T92">in Phi</text:span>:</text:p>
      <text:p text:style-name="P47"><text:tab/><text:tab/></text:p>
      <text:p text:style-name="P34"><text:span text:style-name="T76">That is a</text:span> beautiful sentiment rendered <text:span text:style-name="T73">in</text:span> a beautiful script. <text:span text:style-name="T93">In more formal communication, particles are used to mark parts of speech </text:span><text:span text:style-name="T95">in order </text:span><text:span text:style-name="T93">to reduce ambiguity. As well, word markers are often used to distingu</text:span><text:span text:style-name="T103">ish</text:span><text:span text:style-name="T93"> multisyllabic words for clarity. </text:span><text:span text:style-name="T74">Phi Tengwar</text:span><text:span text:style-name="T101"> punctuation is outlined in Table 3. </text:span><text:span text:style-name="T75">As an</text:span><text:span text:style-name="T93"> example, </text:span><text:span text:style-name="T70">the phrase</text:span><text:span text:style-name="T57"> “</text:span><text:span text:style-name="T67">I love you”</text:span><text:span text:style-name="T93"> </text:span><text:span text:style-name="T71">would be</text:span><text:span text:style-name="T93"> written formally </text:span><text:span text:style-name="T71">as</text:span><text:span text:style-name="T93">:</text:span></text:p>
      <text:p text:style-name="P48"><text:tab/><text:tab/><text:span text:style-name="T98"></text:span>⸱⸱⸱<text:span text:style-name="T8">⸱⸱</text:span></text:p>
      <text:p text:style-name="P25">Table <text:sequence text:ref-name="refTable0" text:name="Table" text:formula="ooow:Table+1" style:num-format="1">1</text:sequence>: Phi <text:span text:style-name="T100">consonant </text:span>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13">Grapheme</text:p>
          </table:table-cell>
          <table:table-cell table:style-name="Table1.B1" office:value-type="string">
            <text:p text:style-name="P14">Tengwa</text:p>
          </table:table-cell>
          <table:table-cell table:style-name="Table1.A1" office:value-type="string">
            <text:p text:style-name="P15">Keypress</text:p>
          </table:table-cell>
        </table:table-row>
        <table:table-row table:style-name="Table1.2">
          <table:table-cell table:style-name="Table1.A2" office:value-type="string">
            <text:p text:style-name="P16">p</text:p>
          </table:table-cell>
          <table:table-cell table:style-name="Table1.B2" office:value-type="string">
            <text:p text:style-name="P22"></text:p>
          </table:table-cell>
          <table:table-cell table:style-name="Table1.A2" office:value-type="string">
            <text:p text:style-name="P17">p</text:p>
          </table:table-cell>
        </table:table-row>
        <table:table-row table:style-name="Table1.3">
          <table:table-cell table:style-name="Table1.A3" office:value-type="string">
            <text:p text:style-name="P16">t</text:p>
          </table:table-cell>
          <table:table-cell table:style-name="Table1.B3" office:value-type="string">
            <text:p text:style-name="P22"></text:p>
          </table:table-cell>
          <table:table-cell table:style-name="Table1.A3" office:value-type="string">
            <text:p text:style-name="P17">t</text:p>
          </table:table-cell>
        </table:table-row>
        <table:table-row table:style-name="Table1.4">
          <table:table-cell table:style-name="Table1.A2" office:value-type="string">
            <text:p text:style-name="P16">m</text:p>
          </table:table-cell>
          <table:table-cell table:style-name="Table1.B2" office:value-type="string">
            <text:p text:style-name="P22"></text:p>
          </table:table-cell>
          <table:table-cell table:style-name="Table1.A2" office:value-type="string">
            <text:p text:style-name="P17">m</text:p>
          </table:table-cell>
        </table:table-row>
        <table:table-row table:style-name="Table1.5">
          <table:table-cell table:style-name="Table1.A3" office:value-type="string">
            <text:p text:style-name="P16">n</text:p>
          </table:table-cell>
          <table:table-cell table:style-name="Table1.B3" office:value-type="string">
            <text:p text:style-name="P22"></text:p>
          </table:table-cell>
          <table:table-cell table:style-name="Table1.A3" office:value-type="string">
            <text:p text:style-name="P17">n</text:p>
          </table:table-cell>
        </table:table-row>
        <table:table-row table:style-name="Table1.6">
          <table:table-cell table:style-name="Table1.A2" office:value-type="string">
            <text:p text:style-name="P16">r</text:p>
          </table:table-cell>
          <table:table-cell table:style-name="Table1.B2" office:value-type="string">
            <text:p text:style-name="P22"></text:p>
          </table:table-cell>
          <table:table-cell table:style-name="Table1.A2" office:value-type="string">
            <text:p text:style-name="P18">shift-r</text:p>
          </table:table-cell>
        </table:table-row>
        <table:table-row table:style-name="Table1.7">
          <table:table-cell table:style-name="Table1.A3" office:value-type="string">
            <text:p text:style-name="P16">s</text:p>
          </table:table-cell>
          <table:table-cell table:style-name="Table1.B3" office:value-type="string">
            <text:p text:style-name="P23"></text:p>
          </table:table-cell>
          <table:table-cell table:style-name="Table1.A3" office:value-type="string">
            <text:p text:style-name="P17">s</text:p>
          </table:table-cell>
        </table:table-row>
        <table:table-row table:style-name="Table1.8">
          <table:table-cell table:style-name="Table1.A2" office:value-type="string">
            <text:p text:style-name="P16">s</text:p>
          </table:table-cell>
          <table:table-cell table:style-name="Table1.B2" office:value-type="string">
            <text:p text:style-name="P22"></text:p>
          </table:table-cell>
          <table:table-cell table:style-name="Table1.A2" office:value-type="string">
            <text:p text:style-name="P17">shift-s</text:p>
          </table:table-cell>
        </table:table-row>
        <table:table-row table:style-name="Table1.9">
          <table:table-cell table:style-name="Table1.A3" office:value-type="string">
            <text:p text:style-name="P16">h</text:p>
          </table:table-cell>
          <table:table-cell table:style-name="Table1.B3" office:value-type="string">
            <text:p text:style-name="P22"></text:p>
          </table:table-cell>
          <table:table-cell table:style-name="Table1.A3" office:value-type="string">
            <text:p text:style-name="P17">h</text:p>
          </table:table-cell>
        </table:table-row>
        <table:table-row table:style-name="Table1.10">
          <table:table-cell table:style-name="Table1.A2" office:value-type="string">
            <text:p text:style-name="P16">l</text:p>
          </table:table-cell>
          <table:table-cell table:style-name="Table1.B2" office:value-type="string">
            <text:p text:style-name="P22"></text:p>
          </table:table-cell>
          <table:table-cell table:style-name="Table1.A2" office:value-type="string">
            <text:p text:style-name="P17">l</text:p>
          </table:table-cell>
        </table:table-row>
        <table:table-row table:style-name="Table1.11">
          <table:table-cell table:style-name="Table1.A3" office:value-type="string">
            <text:p text:style-name="P16">w</text:p>
          </table:table-cell>
          <table:table-cell table:style-name="Table1.B3" office:value-type="string">
            <text:p text:style-name="P22"></text:p>
          </table:table-cell>
          <table:table-cell table:style-name="Table1.A3" office:value-type="string">
            <text:p text:style-name="P21">w</text:p>
          </table:table-cell>
        </table:table-row>
        <table:table-row table:style-name="Table1.12">
          <table:table-cell table:style-name="Table1.A2" office:value-type="string">
            <text:p text:style-name="P16">ph</text:p>
          </table:table-cell>
          <table:table-cell table:style-name="Table1.B2" office:value-type="string">
            <text:p text:style-name="P22"></text:p>
          </table:table-cell>
          <table:table-cell table:style-name="Table1.A2" office:value-type="string">
            <text:p text:style-name="P17">shift-p</text:p>
          </table:table-cell>
        </table:table-row>
        <table:table-row table:style-name="Table1.13">
          <table:table-cell table:style-name="Table1.A3" office:value-type="string">
            <text:p text:style-name="P16">th</text:p>
          </table:table-cell>
          <table:table-cell table:style-name="Table1.B3" office:value-type="string">
            <text:p text:style-name="P22"></text:p>
          </table:table-cell>
          <table:table-cell table:style-name="Table1.A3" office:value-type="string">
            <text:p text:style-name="P17">shift-t</text:p>
          </table:table-cell>
        </table:table-row>
        <table:table-row table:style-name="Table1.14">
          <table:table-cell table:style-name="Table1.A2" office:value-type="string">
            <text:p text:style-name="P16">sh</text:p>
          </table:table-cell>
          <table:table-cell table:style-name="Table1.B14" office:value-type="string">
            <text:p text:style-name="P22"></text:p>
          </table:table-cell>
          <table:table-cell table:style-name="Table1.A2" office:value-type="string">
            <text:p text:style-name="P17">shift-c</text:p>
          </table:table-cell>
        </table:table-row>
        <table:table-row table:style-name="Table1.15">
          <table:table-cell table:style-name="Table1.A3" office:value-type="string">
            <text:p text:style-name="P16">wh</text:p>
          </table:table-cell>
          <table:table-cell table:style-name="Table1.B3" office:value-type="string">
            <text:p text:style-name="P22"></text:p>
          </table:table-cell>
          <table:table-cell table:style-name="Table1.A3" office:value-type="string">
            <text:p text:style-name="P17">shift-k</text:p>
          </table:table-cell>
        </table:table-row>
      </table:table>
      <text:p text:style-name="P39"><text:soft-page-break/>Table <text:sequence text:ref-name="refTable1" text:name="Table" text:formula="ooow:Table+1" style:num-format="1">2</text:sequence>: Phi vowel grapheme to Tengwar mappin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591777530496">
            <table:table-cell table:style-name="Table2.A1" office:value-type="string">
              <text:p text:style-name="P13">Grapheme</text:p>
            </table:table-cell>
            <table:table-cell table:style-name="Table2.B1" office:value-type="string">
              <text:p text:style-name="P14">Te<text:span text:style-name="T88">hta</text:span></text:p>
            </table:table-cell>
            <table:table-cell table:style-name="Table2.A1" office:value-type="string">
              <text:p text:style-name="P15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6">i</text:p>
          </table:table-cell>
          <table:table-cell table:style-name="Table2.B2" office:value-type="string">
            <text:p text:style-name="P22"> <text:s/><text:span text:style-name="T83"></text:span></text:p>
          </table:table-cell>
          <table:table-cell table:style-name="Table2.A2" office:value-type="string">
            <text:p text:style-name="P21">i / <text:span text:style-name="T87">option</text:span><text:span text:style-name="T83">-i</text:span><text:span text:style-name="T83"><text:note text:id="ftn6" text:note-class="footnote"><text:note-citation>6</text:note-citation><text:note-body><text:p text:style-name="P3">Keypresses <text:span text:style-name="T86">for the </text:span><text:span text:style-name="T89">low </text:span><text:span text:style-name="T86">diacriticals </text:span>are given for <text:span text:style-name="T62">macOS</text:span>. <text:span text:style-name="T63">U</text:span><text:span text:style-name="T62">se </text:span><text:span text:style-name="T64">ctrl-alt</text:span><text:span text:style-name="T62"> </text:span><text:span text:style-name="T63">on Windows </text:span><text:span text:style-name="T62">instead of </text:span><text:span text:style-name="T64">option</text:span><text:span text:style-name="T62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16">e</text:p>
          </table:table-cell>
          <table:table-cell table:style-name="Table2.B3" office:value-type="string">
            <text:p text:style-name="P22"> <text:s/><text:span text:style-name="T83"></text:span></text:p>
          </table:table-cell>
          <table:table-cell table:style-name="Table2.A3" office:value-type="string">
            <text:p text:style-name="P20">e / <text:span text:style-name="T87">option</text:span><text:span text:style-name="T83">-e</text:span></text:p>
          </table:table-cell>
        </table:table-row>
        <table:table-row table:style-name="Table2.4">
          <table:table-cell table:style-name="Table2.A2" office:value-type="string">
            <text:p text:style-name="P16">o</text:p>
          </table:table-cell>
          <table:table-cell table:style-name="Table2.B4" office:value-type="string">
            <text:p text:style-name="P22"> <text:s/><text:span text:style-name="T83"></text:span></text:p>
          </table:table-cell>
          <table:table-cell table:style-name="Table2.A2" office:value-type="string">
            <text:p text:style-name="P20">o / <text:span text:style-name="T87">option</text:span><text:span text:style-name="T83">-o</text:span></text:p>
          </table:table-cell>
        </table:table-row>
        <table:table-row table:style-name="Table2.2">
          <table:table-cell table:style-name="Table2.A3" office:value-type="string">
            <text:p text:style-name="P16">a</text:p>
          </table:table-cell>
          <table:table-cell table:style-name="Table2.B3" office:value-type="string">
            <text:p text:style-name="P22"> <text:s/><text:span text:style-name="T83"></text:span></text:p>
          </table:table-cell>
          <table:table-cell table:style-name="Table2.A3" office:value-type="string">
            <text:p text:style-name="P19">a / <text:span text:style-name="T87">option</text:span><text:span text:style-name="T83">-a</text:span></text:p>
          </table:table-cell>
        </table:table-row>
      </table:table>
      <text:p text:style-name="Text_20_body"/>
      <text:p text:style-name="P39">Table <text:sequence text:ref-name="refTable2" text:name="Table" text:formula="ooow:Table+1" style:num-format="1">3</text:sequence>: Phi punctuation to Tengwar mapp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591691389984">
            <table:table-cell table:style-name="Table3.A1" office:value-type="string">
              <text:p text:style-name="P46">Punctuation</text:p>
            </table:table-cell>
            <table:table-cell table:style-name="Table3.B1" office:value-type="string">
              <text:p text:style-name="P46">Tengwar</text:p>
            </table:table-cell>
            <table:table-cell table:style-name="Table3.A1" office:value-type="string">
              <text:p text:style-name="P15">Keypres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2">space</text:p>
          </table:table-cell>
          <table:table-cell table:style-name="Table3.B2" office:value-type="string">
            <text:p text:style-name="P44">⸱</text:p>
          </table:table-cell>
          <table:table-cell table:style-name="Table3.A2" office:value-type="string">
            <text:p text:style-name="P19">,</text:p>
          </table:table-cell>
        </table:table-row>
        <table:table-row table:style-name="Table3.2">
          <table:table-cell table:style-name="Table3.A3" office:value-type="string">
            <text:p text:style-name="P42">period</text:p>
          </table:table-cell>
          <table:table-cell table:style-name="Table3.B3" office:value-type="string">
            <text:p text:style-name="P22">:</text:p>
          </table:table-cell>
          <table:table-cell table:style-name="Table3.A3" office:value-type="string">
            <text:p text:style-name="P41">shift-,</text:p>
          </table:table-cell>
        </table:table-row>
      </table:table>
      <text:h text:style-name="P29" text:outline-level="1"/>
      <text:h text:style-name="P32" text:outline-level="1">Examples</text:h>
      <text:p text:style-name="First_20_Paragraph"><text:span text:style-name="T43">Following are several examples of Phi phrases </text:span><text:span text:style-name="T45">in formal mode</text:span><text:span text:style-name="T43">. They are given </text:span><text:span text:style-name="T44">first </text:span><text:span text:style-name="T43">in English, then in romanized text, and finally in </text:span><text:span text:style-name="T46">the </text:span><text:span text:style-name="T43">Tengwar script.</text:span></text:p>
      <text:p text:style-name="P27">My name <text:span text:style-name="T55">is Daniel<text:line-break/></text:span><text:span text:style-name="T17">si </text:span><text:span text:style-name="T58">phiathe</text:span><text:span text:style-name="T11"> soa mia na </text:span><text:span text:style-name="T12">thanie te phi</text:span></text:p>
      <text:p text:style-name="P51"><text:span text:style-name="T96"></text:span><text:span text:style-name="T6">⸱</text:span><text:span text:style-name="T5"></text:span><text:span text:style-name="T56">⸱⸱⸱</text:span>⸱⸱</text:p>
      <text:p text:style-name="Example">I love you.</text:p>
      <text:p text:style-name="P28"><text:span text:style-name="T94">si </text:span>mia na thi te lothea</text:p>
      <text:p text:style-name="P50"><text:span text:style-name="T96"></text:span><text:span text:style-name="T6">⸱</text:span>⸱⸱<text:span text:style-name="T8">⸱⸱</text:span></text:p>
      <text:p text:style-name="Example">The sky is blue.</text:p>
      <text:p text:style-name="P28"><text:span text:style-name="T94">si </text:span>whetho na mipho te phi</text:p>
      <text:p text:style-name="P50"><text:span text:style-name="T96"></text:span><text:span text:style-name="T6">⸱</text:span><text:span text:style-name="T55"></text:span>⸱⸱⸱⸱</text:p>
      <text:p text:style-name="Example">They like food.</text:p>
      <text:p text:style-name="P28"><text:span text:style-name="T94">si </text:span>lo sha na noshea te lephe</text:p>
      <text:p text:style-name="P50"><text:span text:style-name="T96"></text:span><text:span text:style-name="T6">⸱</text:span>⸱⸱⸱⸱⸱</text:p>
      <text:p text:style-name="Example">I like it.</text:p>
      <text:p text:style-name="P28"><text:span text:style-name="T94">si </text:span>mia na sha te lephe</text:p>
      <text:p text:style-name="P50"><text:span text:style-name="T96"></text:span><text:span text:style-name="T6">⸱</text:span>⸱⸱⸱⸱</text:p>
      <text:p text:style-name="Example">I do no like green!</text:p>
      <text:p text:style-name="P28">ho <text:span text:style-name="T95">si</text:span> mia na hashe te me lephe</text:p>
      <text:p text:style-name="P50"><text:span text:style-name="T95">⸱</text:span><text:span text:style-name="T96"></text:span>⸱⸱⸱⸱⸱⸱</text:p>
      <text:p text:style-name="P24">I liked my friend.</text:p>
      <text:p text:style-name="P28"><text:span text:style-name="T94">si </text:span>mia na miwho soa mia te li lephe</text:p>
      <text:p text:style-name="P50"><text:span text:style-name="T97"></text:span><text:span text:style-name="T3">⸱</text:span><text:span text:style-name="T18">⸱⸱</text:span><text:span text:style-name="T21"></text:span><text:span text:style-name="T2"></text:span><text:span text:style-name="T19">⸱</text:span><text:span text:style-name="T18">⸱⸱</text:span><text:span text:style-name="T19">⸱</text:span><text:span text:style-name="T18">⸱</text:span></text:p>
      <text:p text:style-name="Example">The food is ours.</text:p>
      <text:p text:style-name="P28"><text:span text:style-name="T94">si </text:span>noshea na soa lo mia te phi</text:p>
      <text:p text:style-name="P49"><text:span text:style-name="T96"></text:span><text:span text:style-name="T6">⸱</text:span>⸱⸱⸱⸱⸱⸱<text:span text:style-name="T54"></text:span></text:p>
      <text:p text:style-name="Example">Our food is good.</text:p>
      <text:p text:style-name="P28"><text:span text:style-name="T94">si </text:span>noshea soa lo mia na shishoa te phi</text:p>
      <text:p text:style-name="P49"><text:span text:style-name="T7"></text:span><text:span text:style-name="T6">⸱</text:span>⸱<text:span text:style-name="T42"></text:span>⸱⸱<text:span text:style-name="T4">⸱</text:span><text:span text:style-name="T4">⸱</text:span>⸱⸱</text:p>
      <text:p text:style-name="Example">Are you in good health?</text:p>
      <text:p text:style-name="P27"><text:span text:style-name="T94">si </text:span>wha thi na ropho shishoa te la phe</text:p>
      <text:p text:style-name="P49"><text:span text:style-name="T95">⸱</text:span><text:span text:style-name="T96"></text:span>⸱⸱⸱⸱⸱⸱<text:span text:style-name="T55"></text:span>⸱</text:p>
      <text:p text:style-name="Example">We love the orange trees.</text:p>
      <text:p text:style-name="Example"><text:span text:style-name="T94">si </text:span>lo mia na lo lipha sathe te lothea</text:p>
      <text:p text:style-name="P50"><text:span text:style-name="T96"></text:span><text:span text:style-name="T6">⸱</text:span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pitch="variable"/>
    <style:font-face style:name="Tengwar Telcontar:=31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1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/><text:span text:style-name="MT1">of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4T11:03:04.050000000</dc:date>
    <meta:editing-duration>PT5H43M</meta:editing-duration>
    <meta:editing-cycles>42</meta:editing-cycles>
    <meta:generator>LibreOffice/7.1.2.2$Windows_X86_64 LibreOffice_project/8a45595d069ef5570103caea1b71cc9d82b2aae4</meta:generator>
    <meta:print-date>2021-04-14T07:07:23.311000000</meta:print-date>
    <meta:document-statistic meta:table-count="3" meta:image-count="0" meta:object-count="0" meta:page-count="8" meta:paragraph-count="134" meta:word-count="1244" meta:character-count="5467" meta:non-whitespace-character-count="4674"/>
  </office:meta>
</office:document-meta>
</file>