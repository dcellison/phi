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font-size="12pt" fo:letter-spacing="normal" officeooo:rsid="001f77fd" officeooo:paragraph-rsid="001f77fd" style:font-size-asian="10.5pt" style:font-size-complex="12pt"/>
    </style:style>
    <style:style style:name="P2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3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4" style:family="paragraph" style:parent-style-name="Standard"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11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15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6" style:family="paragraph" style:parent-style-name="Standard">
      <style:text-properties style:font-name="Palatino Linotype" fo:font-size="8pt" fo:letter-spacing="normal" officeooo:rsid="00198582" officeooo:paragraph-rsid="00223347" style:font-size-asian="8pt" style:font-size-complex="8pt"/>
    </style:style>
    <style:style style:name="P17" style:family="paragraph" style:parent-style-name="Standard">
      <style:text-properties style:font-name="Palatino Linotype" fo:font-size="8pt" fo:letter-spacing="normal" fo:font-style="italic" officeooo:rsid="002069f4" officeooo:paragraph-rsid="002069f4" style:font-size-asian="8pt" style:font-style-asian="italic" style:font-size-complex="8pt" style:font-style-complex="italic"/>
    </style:style>
    <style:style style:name="P18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9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20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21" style:family="paragraph" style:parent-style-name="Standard">
      <style:text-properties officeooo:rsid="002cbf0c" officeooo:paragraph-rsid="002cbf0c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5" style:family="paragraph" style:parent-style-name="Standard">
      <style:paragraph-properties fo:break-before="page"/>
      <style:text-properties style:font-name="Palatino Linotype" fo:font-size="18pt" fo:letter-spacing="normal" officeooo:rsid="001f77fd" officeooo:paragraph-rsid="001f77fd" style:font-size-asian="18pt" style:font-size-complex="18pt"/>
    </style:style>
    <style:style style:name="P26" style:family="paragraph" style:parent-style-name="Standard" style:master-page-name="Standard">
      <style:paragraph-properties style:page-number="1"/>
      <style:text-properties style:font-name="Palatino Linotype" fo:font-size="12pt" fo:letter-spacing="normal" fo:font-style="normal" officeooo:rsid="00232f95" officeooo:paragraph-rsid="00232f95" style:font-size-asian="10.5pt" style:font-style-asian="normal" style:font-size-complex="12pt" style:font-style-complex="normal"/>
    </style:style>
    <style:style style:name="P27" style:family="paragraph" style:parent-style-name="Standard" style:master-page-name="Standard">
      <style:paragraph-properties style:page-number="auto"/>
      <style:text-properties style:font-name="Palatino Linotype" fo:font-size="18pt" officeooo:rsid="002aebfd" officeooo:paragraph-rsid="002aebfd" style:font-size-asian="18pt" style:font-size-complex="18pt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4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5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T1" style:family="text">
      <style:text-properties officeooo:rsid="001f77f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bf0c" style:font-style-asian="italic" style:font-style-complex="itali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32f95" style:font-style-asian="normal" style:font-style-complex="normal"/>
    </style:style>
    <style:style style:name="T7" style:family="text">
      <style:text-properties fo:font-style="normal" officeooo:rsid="002b0442" style:font-style-asian="normal" style:font-style-complex="normal"/>
    </style:style>
    <style:style style:name="T8" style:family="text">
      <style:text-properties officeooo:rsid="0023afa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28e509"/>
    </style:style>
    <style:style style:name="T11" style:family="text">
      <style:text-properties fo:color="#6089b4" loext:opacity="100%"/>
    </style:style>
    <style:style style:name="T12" style:family="text">
      <style:text-properties officeooo:rsid="002b0442"/>
    </style:style>
    <style:style style:name="T13" style:family="text">
      <style:text-properties fo:color="#9872a2" loext:opacity="100%"/>
    </style:style>
    <style:style style:name="T14" style:family="text">
      <style:text-properties officeooo:rsid="002cbf0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4">φ</text:p>
      <text:p text:style-name="P28"/>
      <text:p text:style-name="P32">Phi</text:p>
      <text:p text:style-name="P30">A constructed language</text:p>
      <text:p text:style-name="P29"/>
      <text:p text:style-name="P33">Daniel Ellison</text:p>
      <text:p text:style-name="P31"/>
      <text:p text:style-name="P33"><text:date style:data-style-name="N75" text:date-value="2021-04-12T17:37:21.785999969" text:fixed="true">Apr 12, 2021</text:date></text:p>
      <text:p text:style-name="P27">1. Introduction</text:p>
      <text:p text:style-name="P14"/>
      <text:p text:style-name="P14">Phi is a constructed language. Its name embodies the simplicity and softness of the language itself. <text:span text:style-name="T2">Phi</text:span><text:span text:style-name="T5"> (Φ) is also beauty in mathematics. It is</text:span></text:p>
      <text:p text:style-name="P14"><text:span text:style-name="T5"/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5"> – </text:span><text:span text:style-name="T7">Wiktionary</text:span></text:p>
      <text:p text:style-name="Standard">It is thought that the value of <text:span text:style-name="T3">p</text:span><text:span text:style-name="T2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p text:style-name="P25">2. Examples</text:p>
      <text:p text:style-name="P1"/>
      <text:p text:style-name="P22"><text:span text:style-name="T4">Following are several examples of Phi phrases. They are given in English, then in romanized text, and finally in the Tengwar script of J.R.R. Tolkien.</text:span></text:p>
      <text:p text:style-name="P24"/>
      <text:p text:style-name="P23">I love you.</text:p>
      <text:p text:style-name="P5">mia na thi te lothea</text:p>
      <text:p text:style-name="Tengwar">⸱⸱<text:span text:style-name="T1">⸱⸱</text:span></text:p>
      <text:p text:style-name="P3"><text:span text:style-name="T9"><text:line-break/></text:span>The sky is blue.</text:p>
      <text:p text:style-name="P7">huwha na mipho te phi</text:p>
      <text:p text:style-name="Tengwar">⸱⸱⸱⸱</text:p>
      <text:p text:style-name="P15"/>
      <text:p text:style-name="P2">They like food.</text:p>
      <text:p text:style-name="P6">lo sha na noshea te lephe</text:p>
      <text:p text:style-name="Tengwar">⸱⸱⸱⸱⸱</text:p>
      <text:p text:style-name="P17"><text:span text:style-name="T5"/></text:p>
      <text:p text:style-name="P11">I like it.</text:p>
      <text:p text:style-name="P6">mia na sha te lephe</text:p>
      <text:p text:style-name="Tengwar">⸱⸱⸱⸱</text:p>
      <text:p text:style-name="P18"/>
      <text:p text:style-name="P12">I do no like green!</text:p>
      <text:p text:style-name="P8">ho mia na hashe te me lephe</text:p>
      <text:p text:style-name="Tengwar">⸱⸱⸱⸱⸱⸱</text:p>
      <text:p text:style-name="P18"/>
      <text:p text:style-name="P12">I liked my friend.</text:p>
      <text:p text:style-name="P8">mia na methu soa mia te li lephe</text:p>
      <text:p text:style-name="Tengwar"><text:span text:style-name="T5">⸱⸱</text:span><text:span text:style-name="T6">⸱</text:span><text:span text:style-name="T5">⸱⸱</text:span><text:span text:style-name="T6">⸱</text:span><text:span text:style-name="T5">⸱</text:span></text:p>
      <text:p text:style-name="P16"/>
      <text:p text:style-name="P4">The food is ours.</text:p>
      <text:p text:style-name="P9">noshea na soa lo mia te phi</text:p>
      <text:p text:style-name="Tengwar">⸱⸱⸱⸱⸱⸱<text:span text:style-name="T10"></text:span></text:p>
      <text:p text:style-name="P26">Our food is good.</text:p>
      <text:p text:style-name="P9">noshea soa lo mia na shishoa te phi</text:p>
      <text:p text:style-name="Tengwar">⸱<text:span text:style-name="T8"></text:span>⸱⸱⁘⁘⸱⸱</text:p>
      <text:p text:style-name="P19"/>
      <text:p text:style-name="P13">Are you in good health?</text:p>
      <text:p text:style-name="P10">wha thi na ropho shishoa te lu phe</text:p>
      <text:p text:style-name="Tengwar">⸱⸱⸱⸱⸱⸱⸱</text:p>
      <text:p text:style-name="P20"/>
      <text:p text:style-name="P13">We love the orange trees.</text:p>
      <text:p text:style-name="P10">lo mia na lo lipha sathe te lothea</text:p>
      <text:p text:style-name="Tengwar">⸱⸱⸱⸱⸱⸱⸱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1" fo:font-family="'Tengwar Telcontar'" style:font-pitch="variable" fo:font-size="22pt" fo:letter-spacing="normal" officeooo:rsid="00140535" style:font-size-asian="22pt" style:font-size-complex="2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2T18:20:36.529000000</dc:date>
    <meta:editing-duration>PT21M18S</meta:editing-duration>
    <meta:editing-cycles>5</meta:editing-cycles>
    <meta:generator>LibreOffice/7.1.2.2$Windows_X86_64 LibreOffice_project/8a45595d069ef5570103caea1b71cc9d82b2aae4</meta:generator>
    <meta:print-date>2021-04-12T18:20:44.404000000</meta:print-date>
    <meta:document-statistic meta:table-count="0" meta:image-count="0" meta:object-count="0" meta:page-count="5" meta:paragraph-count="41" meta:word-count="504" meta:character-count="1575" meta:non-whitespace-character-count="1345"/>
  </office:meta>
</office:document-meta>
</file>