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42in"/>
    </style:style>
    <style:style style:name="Table1.A1" style:family="table-cell">
      <style:table-cell-properties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1.B19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Example">
      <style:text-properties fo:font-style="italic" style:font-style-asian="italic" style:font-style-complex="italic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4f5cd4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4" style:family="paragraph" style:parent-style-name="Tengwar">
      <style:text-properties officeooo:paragraph-rsid="003b443c"/>
    </style:style>
    <style:style style:name="P15" style:family="paragraph" style:parent-style-name="Tengwar">
      <style:text-properties officeooo:rsid="002f6327" officeooo:paragraph-rsid="002f6327"/>
    </style:style>
    <style:style style:name="P16" style:family="paragraph" style:parent-style-name="Tengwar">
      <style:text-properties officeooo:paragraph-rsid="002f6327"/>
    </style:style>
    <style:style style:name="P17" style:family="paragraph" style:parent-style-name="Tengwar">
      <style:text-properties officeooo:paragraph-rsid="00405c24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467f50" officeooo:paragraph-rsid="00467f50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2pt" fo:font-style="normal" fo:text-shadow="none" style:text-underline-style="none" fo:font-weight="normal" officeooo:rsid="0051e91f" officeooo:paragraph-rsid="0051e91f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Example">
      <style:paragraph-properties fo:break-before="page"/>
      <style:text-properties officeooo:paragraph-rsid="004f26e4"/>
    </style:style>
    <style:style style:name="P31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32" style:family="paragraph" style:parent-style-name="Footnote">
      <style:text-properties fo:font-style="italic" style:font-style-asian="italic" style:font-style-complex="italic"/>
    </style:style>
    <style:style style:name="P33" style:family="paragraph" style:parent-style-name="Heading_20_1" style:master-page-name="Standard">
      <style:paragraph-properties style:page-number="auto"/>
    </style:style>
    <style:style style:name="P34" style:family="paragraph" style:parent-style-name="Heading_20_1">
      <style:paragraph-properties fo:break-before="page"/>
      <style:text-properties officeooo:rsid="003b443c" officeooo:paragraph-rsid="003b443c"/>
    </style:style>
    <style:style style:name="P35" style:family="paragraph" style:parent-style-name="Tengwar">
      <style:text-properties officeooo:paragraph-rsid="004f26e4"/>
    </style:style>
    <style:style style:name="T1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style:font-name="Tengwar Telcontar" fo:font-size="22pt" fo:letter-spacing="normal" officeooo:rsid="002fa56f" style:font-size-asian="22pt" style:font-size-complex="22pt"/>
    </style:style>
    <style:style style:name="T3" style:family="text">
      <style:text-properties style:font-name="Tengwar Telcontar" fo:font-size="22pt" fo:letter-spacing="normal" officeooo:rsid="00340f5e" style:font-size-asian="22pt" style:font-size-complex="22pt"/>
    </style:style>
    <style:style style:name="T4" style:family="text">
      <style:text-properties officeooo:rsid="001f77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bf0c" style:font-style-asian="italic" style:font-style-complex="italic"/>
    </style:style>
    <style:style style:name="T7" style:family="text">
      <style:text-properties fo:font-style="italic" officeooo:rsid="0032b8f3" style:font-style-asian="italic" style:font-style-complex="italic"/>
    </style:style>
    <style:style style:name="T8" style:family="text">
      <style:text-properties fo:font-style="italic" officeooo:rsid="002f6327" style:font-style-asian="italic" style:font-style-complex="italic"/>
    </style:style>
    <style:style style:name="T9" style:family="text">
      <style:text-properties fo:font-style="italic" officeooo:rsid="00434435" style:font-style-asian="italic" style:font-style-complex="italic"/>
    </style:style>
    <style:style style:name="T10" style:family="text">
      <style:text-properties fo:font-style="italic" officeooo:rsid="0053050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32f95" style:font-style-asian="normal" style:font-style-complex="normal"/>
    </style:style>
    <style:style style:name="T13" style:family="text">
      <style:text-properties fo:font-style="normal" officeooo:rsid="002b0442" style:font-style-asian="normal" style:font-style-complex="normal"/>
    </style:style>
    <style:style style:name="T14" style:family="text">
      <style:text-properties fo:font-style="normal" officeooo:rsid="002f6327" style:font-style-asian="normal" style:font-style-complex="normal"/>
    </style:style>
    <style:style style:name="T15" style:family="text">
      <style:text-properties fo:font-style="normal" officeooo:rsid="00434435" style:font-style-asian="normal" style:font-style-complex="normal"/>
    </style:style>
    <style:style style:name="T16" style:family="text">
      <style:text-properties fo:font-style="normal" officeooo:rsid="004ca095" style:font-style-asian="normal" style:font-style-complex="normal"/>
    </style:style>
    <style:style style:name="T17" style:family="text">
      <style:text-properties fo:font-style="normal" officeooo:rsid="004e5177" style:font-style-asian="normal" style:font-style-complex="normal"/>
    </style:style>
    <style:style style:name="T18" style:family="text">
      <style:text-properties fo:font-style="normal" officeooo:rsid="0041eff8" style:font-style-asian="normal" style:font-style-complex="normal"/>
    </style:style>
    <style:style style:name="T19" style:family="text">
      <style:text-properties fo:font-style="normal" officeooo:rsid="004f26e4" style:font-style-asian="normal" style:font-style-complex="normal"/>
    </style:style>
    <style:style style:name="T20" style:family="text">
      <style:text-properties fo:font-style="normal" officeooo:rsid="0051e91f" style:font-style-asian="normal" style:font-style-complex="normal"/>
    </style:style>
    <style:style style:name="T21" style:family="text">
      <style:text-properties fo:font-style="normal" officeooo:rsid="00530507" style:font-style-asian="normal" style:font-style-complex="normal"/>
    </style:style>
    <style:style style:name="T22" style:family="text">
      <style:text-properties fo:font-style="normal" officeooo:rsid="0054cfe5" style:font-style-asian="normal" style:font-style-complex="normal"/>
    </style:style>
    <style:style style:name="T23" style:family="text">
      <style:text-properties fo:font-style="normal" officeooo:rsid="005648a8" style:font-style-asian="normal" style:font-style-complex="normal"/>
    </style:style>
    <style:style style:name="T24" style:family="text">
      <style:text-properties officeooo:rsid="0023afad"/>
    </style:style>
    <style:style style:name="T25" style:family="text">
      <style:text-properties style:font-name="Palatino Linotype1" fo:font-size="12pt" fo:letter-spacing="normal" officeooo:rsid="001f77fd" style:font-size-asian="10.5pt" style:font-size-complex="12pt"/>
    </style:style>
    <style:style style:name="T26" style:family="text">
      <style:text-properties style:font-name="Palatino Linotype1" fo:font-size="12pt" fo:letter-spacing="normal" officeooo:rsid="003079ad" style:font-size-asian="10.5pt" style:font-size-complex="12pt"/>
    </style:style>
    <style:style style:name="T27" style:family="text">
      <style:text-properties style:font-name="Palatino Linotype1" fo:font-size="12pt" officeooo:rsid="002aebfd" style:font-size-asian="10.5pt" style:font-size-complex="12pt"/>
    </style:style>
    <style:style style:name="T28" style:family="text">
      <style:text-properties style:font-name="Palatino Linotype1" fo:font-size="12pt" officeooo:rsid="0054cfe5" style:font-size-asian="10.5pt" style:font-size-complex="12pt"/>
    </style:style>
    <style:style style:name="T29" style:family="text">
      <style:text-properties style:font-name="Palatino Linotype1" fo:font-size="12pt" officeooo:rsid="005a0109" style:font-size-asian="10.5pt" style:font-size-complex="12pt"/>
    </style:style>
    <style:style style:name="T30" style:family="text">
      <style:text-properties style:font-name="Palatino Linotype1" fo:font-size="12pt" officeooo:rsid="005bff1b" style:font-size-asian="10.5pt" style:font-size-complex="12pt"/>
    </style:style>
    <style:style style:name="T31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32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33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34" style:family="text">
      <style:text-properties officeooo:rsid="0028e509"/>
    </style:style>
    <style:style style:name="T35" style:family="text">
      <style:text-properties officeooo:rsid="002f6327"/>
    </style:style>
    <style:style style:name="T36" style:family="text">
      <style:text-properties officeooo:rsid="0032b8f3"/>
    </style:style>
    <style:style style:name="T37" style:family="text">
      <style:text-properties style:font-name="Palatino Linotype" fo:font-style="italic" officeooo:rsid="00340f5e" style:font-style-asian="italic" style:font-style-complex="italic"/>
    </style:style>
    <style:style style:name="T38" style:family="text">
      <style:text-properties style:font-name="Palatino Linotype" officeooo:rsid="003ee6d6"/>
    </style:style>
    <style:style style:name="T39" style:family="text">
      <style:text-properties style:font-name="Palatino Linotype" officeooo:rsid="004ca095"/>
    </style:style>
    <style:style style:name="T40" style:family="text">
      <style:text-properties style:font-name="Palatino Linotype" fo:font-size="10pt" officeooo:rsid="0051e91f" style:font-size-asian="10pt" style:font-size-complex="10pt"/>
    </style:style>
    <style:style style:name="T41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42" style:family="text">
      <style:text-properties style:font-name="Palatino Linotype" officeooo:rsid="005bff1b"/>
    </style:style>
    <style:style style:name="T43" style:family="text">
      <style:text-properties style:font-name="Palatino Linotype" officeooo:rsid="005dfc65"/>
    </style:style>
    <style:style style:name="T44" style:family="text">
      <style:text-properties officeooo:rsid="003eb40c"/>
    </style:style>
    <style:style style:name="T45" style:family="text">
      <style:text-properties officeooo:rsid="003ee6d6"/>
    </style:style>
    <style:style style:name="T46" style:family="text">
      <style:text-properties fo:font-variant="small-caps" style:font-name="Palatino Linotype1" fo:font-size="12pt" officeooo:rsid="002aebfd" style:font-size-asian="10.5pt" style:font-size-complex="12pt"/>
    </style:style>
    <style:style style:name="T47" style:family="text">
      <style:text-properties officeooo:rsid="0041eff8"/>
    </style:style>
    <style:style style:name="T48" style:family="text">
      <style:text-properties officeooo:rsid="00434435"/>
    </style:style>
    <style:style style:name="T49" style:family="text">
      <style:text-properties officeooo:rsid="004a8779"/>
    </style:style>
    <style:style style:name="T50" style:family="text">
      <style:text-properties officeooo:rsid="004ca095"/>
    </style:style>
    <style:style style:name="T51" style:family="text">
      <style:text-properties officeooo:rsid="004e5177"/>
    </style:style>
    <style:style style:name="T52" style:family="text">
      <style:text-properties officeooo:rsid="0050274c"/>
    </style:style>
    <style:style style:name="T53" style:family="text">
      <style:text-properties officeooo:rsid="0051e91f"/>
    </style:style>
    <style:style style:name="T54" style:family="text">
      <style:text-properties officeooo:rsid="005bff1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3T18:47:09.860999761">April 13, 2021</text:date></text:p>
      <text:h text:style-name="P33" text:outline-level="1">Introduction</text:h>
      <text:p text:style-name="First_20_Paragraph"><text:span text:style-name="T46">Phi</text:span><text:span text:style-name="T27"> is a constructed language. </text:span><text:span text:style-name="T29">A constructed language is one whose phonology, grammar, and vocabulary, instead of having developed naturally, are consciously devised</text:span><text:span text:style-name="T29"><text:note text:id="ftn4" text:note-class="footnote"><text:note-citation>1</text:note-citation><text:note-body><text:p text:style-name="Footnote">https://en.wikipedia.org/wiki/Constructed_language</text:p></text:note-body></text:note></text:span><text:span text:style-name="T29">. </text:span><text:span text:style-name="T28">The sound of </text:span><text:span text:style-name="T30">the </text:span><text:span text:style-name="T27">name </text:span><text:span text:style-name="T32">Phi</text:span><text:span text:style-name="T27"> embodies the simplicity and softness of the language itself. </text:span><text:span text:style-name="T31">Phi</text:span><text:span text:style-name="T33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1"> – </text:span><text:span text:style-name="T13">Wiktionary</text:span><text:span text:style-name="T13"><text:note text:id="ftn5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6">p</text:span><text:span text:style-name="T5">hi</text:span> is one of the fundamental characteristics of nature; in the language Phi, nature is fundamental to its being. Listening to spoken Phi one <text:span text:style-name="T42">is </text:span><text:span text:style-name="T43">sometimes</text:span> reminded of the sounds of the natural world. There is also a musicality and rhythm to sentences in the language.</text:p>
      <text:h text:style-name="P34" text:outline-level="1">The Tengwar</text:h>
      <text:p text:style-name="First_20_Paragraph">Phi can be written in <text:span text:style-name="T39">either</text:span> of two ways: using the standard Latin alphabet or the Tengwar script. <text:span text:style-name="T50">Tengwar was</text:span> invented by J. R. R. Tolkien and <text:span text:style-name="T44">described first in </text:span>Appendix E of <text:span text:style-name="T44">the third book in his trilogy, </text:span><text:span text:style-name="T5">The Lord of the Rings</text:span>. <text:span text:style-name="T44">There are numerous sources of information </text:span><text:span text:style-name="T45">available </text:span><text:span text:style-name="T38">concerning </text:span><text:span text:style-name="T44">the Tengwar so details of the script will not be explored here.</text:span></text:p>
      <text:p text:style-name="P12">The look and feel of the Tengwar characters (<text:span text:style-name="T5">tengwa</text:span>) and its diacritical marks (<text:span text:style-name="T5">tehta</text:span>) <text:span text:style-name="T47">match the idea</text:span><text:span text:style-name="T50">l</text:span><text:span text:style-name="T47">s and philosoph</text:span><text:span text:style-name="T50">ies</text:span><text:span text:style-name="T47"> behind this language. Phi has a small set of consonants and vowels so it is relatively straightforward to map its </text:span><text:span text:style-name="T19">graphemes</text:span><text:span text:style-name="T47"> to Tengwar characters.</text:span><text:span text:style-name="T48"> The </text:span><text:span text:style-name="T51">Unicode </text:span><text:span text:style-name="T48">font </text:span><text:span text:style-name="T9">Tengwar Telcontar</text:span><text:span text:style-name="T15"><text:note text:id="ftn1" text:note-class="footnote"><text:note-citation>3</text:note-citation><text:note-body><text:p text:style-name="P4">http://freetengwar.sourceforge.net/tengtelc.html</text:p></text:note-body></text:note></text:span><text:span text:style-name="T15"> is used in this manual to render Phi text in Tengwar script. </text:span><text:span text:style-name="T16">A </text:span><text:span text:style-name="T17">custom keyboard layout</text:span><text:span text:style-name="T17"><text:note text:id="ftn2" text:note-class="footnote"><text:note-citation>4</text:note-citation><text:note-body><text:p text:style-name="P2">http://freetengwar.sourceforge.net/keylayouts.html</text:p></text:note-body></text:note></text:span><text:span text:style-name="T17"> was </text:span><text:span text:style-name="T23">employed</text:span><text:span text:style-name="T17"> to facilitate typing the Teng</text:span><text:span text:style-name="T23">w</text:span><text:span text:style-name="T17">ar characters.</text:span></text:p>
      <text:p text:style-name="P13"><text:span text:style-name="T18">Table </text:span><text:span text:style-name="T22">1 </text:span><text:span text:style-name="T18">outlines </text:span><text:span text:style-name="T15">th</text:span><text:span text:style-name="T17">e</text:span><text:span text:style-name="T15"> mapping </text:span><text:span text:style-name="T17">between the </text:span><text:span text:style-name="T19">graphemes</text:span><text:span text:style-name="T17"> used in Phi and corresponding Tengwar characters, </text:span><text:span text:style-name="T19">as well as the key</text:span><text:span text:style-name="T20">s necessary</text:span><text:span text:style-name="T19"><text:note text:id="ftn3" text:note-class="footnote"><text:note-citation>5</text:note-citation><text:note-body><text:p text:style-name="P3">Keypresses <text:span text:style-name="T52">for the diacriticals </text:span>are given for <text:span text:style-name="T40">macOS</text:span>. <text:span text:style-name="T40">Windows uses </text:span><text:span text:style-name="T41">ctrl-alt</text:span><text:span text:style-name="T40"> instead of </text:span><text:span text:style-name="T41">option</text:span><text:span text:style-name="T40">.</text:span></text:p></text:note-body></text:note></text:span><text:span text:style-name="T20"> to </text:span><text:span text:style-name="T19">produce the characters using the font and keboard layout mentioned previously. </text:span><text:span text:style-name="T20">An application or utility that </text:span><text:span text:style-name="T21">supports Graphite fonts</text:span><text:span text:style-name="T21"><text:note text:id="ftn0" text:note-class="footnote"><text:note-citation>6</text:note-citation><text:note-body><text:p text:style-name="P2">https://scripts.sil.org/cms/scripts/page.php?site_id=projects&amp;item_id=graphite_fonts</text:p></text:note-body></text:note></text:span><text:span text:style-name="T21"> is required for the font to render correctly. This manual was produced using LibreOffice Writer v7.1.2.2, which renders </text:span><text:span text:style-name="T10">Tengwar Telcontar</text:span><text:span text:style-name="T21"> properly. A link to details of this requirement can be found in the first footnote below.</text:span></text:p>
      <text:p text:style-name="P18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 table:number-columns-repeated="3"/>
        <table:table-row table:style-name="TableLine1593174005328">
          <table:table-cell table:style-name="Table1.A1" office:value-type="string">
            <text:p text:style-name="P27">Grapheme</text:p>
          </table:table-cell>
          <table:table-cell table:style-name="Table1.B1" office:value-type="string">
            <text:p text:style-name="P28">Tengwa<text:span text:style-name="T50">r</text:span></text:p>
          </table:table-cell>
          <table:table-cell table:style-name="Table1.A1" office:value-type="string">
            <text:p text:style-name="P29">Keypress</text:p>
          </table:table-cell>
        </table:table-row>
        <table:table-row table:style-name="Table1.2">
          <table:table-cell table:style-name="Table1.A2" office:value-type="string">
            <text:p text:style-name="P21">p</text:p>
          </table:table-cell>
          <table:table-cell table:style-name="Table1.B2" office:value-type="string">
            <text:p text:style-name="P25"></text:p>
          </table:table-cell>
          <table:table-cell table:style-name="Table1.A2" office:value-type="string">
            <text:p text:style-name="P20">p</text:p>
          </table:table-cell>
        </table:table-row>
        <table:table-row table:style-name="TableLine1593174014304">
          <table:table-cell table:style-name="Table1.A3" office:value-type="string">
            <text:p text:style-name="P21">t</text:p>
          </table:table-cell>
          <table:table-cell table:style-name="Table1.B3" office:value-type="string">
            <text:p text:style-name="P25"></text:p>
          </table:table-cell>
          <table:table-cell table:style-name="Table1.A3" office:value-type="string">
            <text:p text:style-name="P20">t</text:p>
          </table:table-cell>
        </table:table-row>
        <table:table-row table:style-name="TableLine1593174002336">
          <table:table-cell table:style-name="Table1.A2" office:value-type="string">
            <text:p text:style-name="P21">m</text:p>
          </table:table-cell>
          <table:table-cell table:style-name="Table1.B2" office:value-type="string">
            <text:p text:style-name="P25"></text:p>
          </table:table-cell>
          <table:table-cell table:style-name="Table1.A2" office:value-type="string">
            <text:p text:style-name="P20">m</text:p>
          </table:table-cell>
        </table:table-row>
        <text:soft-page-break/>
        <table:table-row table:style-name="TableLine1593174003696">
          <table:table-cell table:style-name="Table1.A3" office:value-type="string">
            <text:p text:style-name="P21">n</text:p>
          </table:table-cell>
          <table:table-cell table:style-name="Table1.B3" office:value-type="string">
            <text:p text:style-name="P25"></text:p>
          </table:table-cell>
          <table:table-cell table:style-name="Table1.A3" office:value-type="string">
            <text:p text:style-name="P20">n</text:p>
          </table:table-cell>
        </table:table-row>
        <table:table-row table:style-name="TableLine1593174001248">
          <table:table-cell table:style-name="Table1.A2" office:value-type="string">
            <text:p text:style-name="P21">r</text:p>
          </table:table-cell>
          <table:table-cell table:style-name="Table1.B2" office:value-type="string">
            <text:p text:style-name="P25"></text:p>
          </table:table-cell>
          <table:table-cell table:style-name="Table1.A2" office:value-type="string">
            <text:p text:style-name="P19">shift-r</text:p>
          </table:table-cell>
        </table:table-row>
        <table:table-row table:style-name="TableLine1593174004512">
          <table:table-cell table:style-name="Table1.A3" office:value-type="string">
            <text:p text:style-name="P21">s</text:p>
          </table:table-cell>
          <table:table-cell table:style-name="Table1.B3" office:value-type="string">
            <text:p text:style-name="P26"></text:p>
          </table:table-cell>
          <table:table-cell table:style-name="Table1.A3" office:value-type="string">
            <text:p text:style-name="P20">s</text:p>
          </table:table-cell>
        </table:table-row>
        <table:table-row table:style-name="TableLine1593174001520">
          <table:table-cell table:style-name="Table1.A2" office:value-type="string">
            <text:p text:style-name="P21">s</text:p>
          </table:table-cell>
          <table:table-cell table:style-name="Table1.B2" office:value-type="string">
            <text:p text:style-name="P25"></text:p>
          </table:table-cell>
          <table:table-cell table:style-name="Table1.A2" office:value-type="string">
            <text:p text:style-name="P20">shift-s</text:p>
          </table:table-cell>
        </table:table-row>
        <table:table-row table:style-name="TableLine1593174015120">
          <table:table-cell table:style-name="Table1.A3" office:value-type="string">
            <text:p text:style-name="P21">h</text:p>
          </table:table-cell>
          <table:table-cell table:style-name="Table1.B3" office:value-type="string">
            <text:p text:style-name="P25"></text:p>
          </table:table-cell>
          <table:table-cell table:style-name="Table1.A3" office:value-type="string">
            <text:p text:style-name="P20">h</text:p>
          </table:table-cell>
        </table:table-row>
        <table:table-row table:style-name="TableLine1593174007776">
          <table:table-cell table:style-name="Table1.A2" office:value-type="string">
            <text:p text:style-name="P21">l</text:p>
          </table:table-cell>
          <table:table-cell table:style-name="Table1.B2" office:value-type="string">
            <text:p text:style-name="P25"></text:p>
          </table:table-cell>
          <table:table-cell table:style-name="Table1.A2" office:value-type="string">
            <text:p text:style-name="P20">l</text:p>
          </table:table-cell>
        </table:table-row>
        <table:table-row table:style-name="TableLine1593174015664">
          <table:table-cell table:style-name="Table1.A3" office:value-type="string">
            <text:p text:style-name="P21">w</text:p>
          </table:table-cell>
          <table:table-cell table:style-name="Table1.B3" office:value-type="string">
            <text:p text:style-name="P25"></text:p>
          </table:table-cell>
          <table:table-cell table:style-name="Table1.A3" office:value-type="string">
            <text:p text:style-name="P22">w</text:p>
          </table:table-cell>
        </table:table-row>
        <table:table-row table:style-name="TableLine1593174008048">
          <table:table-cell table:style-name="Table1.A2" office:value-type="string">
            <text:p text:style-name="P21">ph</text:p>
          </table:table-cell>
          <table:table-cell table:style-name="Table1.B2" office:value-type="string">
            <text:p text:style-name="P25"></text:p>
          </table:table-cell>
          <table:table-cell table:style-name="Table1.A2" office:value-type="string">
            <text:p text:style-name="P20">shift-p</text:p>
          </table:table-cell>
        </table:table-row>
        <table:table-row table:style-name="TableLine1593173999888">
          <table:table-cell table:style-name="Table1.A3" office:value-type="string">
            <text:p text:style-name="P21">th</text:p>
          </table:table-cell>
          <table:table-cell table:style-name="Table1.B3" office:value-type="string">
            <text:p text:style-name="P25"></text:p>
          </table:table-cell>
          <table:table-cell table:style-name="Table1.A3" office:value-type="string">
            <text:p text:style-name="P20">shift-t</text:p>
          </table:table-cell>
        </table:table-row>
        <table:table-row table:style-name="TableLine1593174012128">
          <table:table-cell table:style-name="Table1.A2" office:value-type="string">
            <text:p text:style-name="P21">sh</text:p>
          </table:table-cell>
          <table:table-cell table:style-name="Table1.B2" office:value-type="string">
            <text:p text:style-name="P25"></text:p>
          </table:table-cell>
          <table:table-cell table:style-name="Table1.A2" office:value-type="string">
            <text:p text:style-name="P20">shift-c</text:p>
          </table:table-cell>
        </table:table-row>
        <table:table-row table:style-name="TableLine1593174016208">
          <table:table-cell table:style-name="Table1.A3" office:value-type="string">
            <text:p text:style-name="P21">wh</text:p>
          </table:table-cell>
          <table:table-cell table:style-name="Table1.B3" office:value-type="string">
            <text:p text:style-name="P25"></text:p>
          </table:table-cell>
          <table:table-cell table:style-name="Table1.A3" office:value-type="string">
            <text:p text:style-name="P20">shift-k</text:p>
          </table:table-cell>
        </table:table-row>
        <table:table-row table:style-name="Table1.2">
          <table:table-cell table:style-name="Table1.A2" office:value-type="string">
            <text:p text:style-name="P21">i</text:p>
          </table:table-cell>
          <table:table-cell table:style-name="Table1.B2" office:value-type="string">
            <text:p text:style-name="P25"><text:span text:style-name="T49"></text:span></text:p>
          </table:table-cell>
          <table:table-cell table:style-name="Table1.A2" office:value-type="string">
            <text:p text:style-name="P22">i / <text:span text:style-name="T53">option</text:span><text:span text:style-name="T49">-i</text:span></text:p>
          </table:table-cell>
        </table:table-row>
        <table:table-row table:style-name="TableLine1593174006960">
          <table:table-cell table:style-name="Table1.A3" office:value-type="string">
            <text:p text:style-name="P21">e</text:p>
          </table:table-cell>
          <table:table-cell table:style-name="Table1.B3" office:value-type="string">
            <text:p text:style-name="P25"><text:span text:style-name="T49"></text:span></text:p>
          </table:table-cell>
          <table:table-cell table:style-name="Table1.A3" office:value-type="string">
            <text:p text:style-name="P23">e / <text:span text:style-name="T53">option</text:span><text:span text:style-name="T49">-e</text:span></text:p>
          </table:table-cell>
        </table:table-row>
        <table:table-row table:style-name="TableLine1593174002608">
          <table:table-cell table:style-name="Table1.A2" office:value-type="string">
            <text:p text:style-name="P21">o</text:p>
          </table:table-cell>
          <table:table-cell table:style-name="Table1.B2" office:value-type="string">
            <text:p text:style-name="P25"><text:span text:style-name="T49"></text:span></text:p>
          </table:table-cell>
          <table:table-cell table:style-name="Table1.A2" office:value-type="string">
            <text:p text:style-name="P23">o / <text:span text:style-name="T53">option</text:span><text:span text:style-name="T49">-o</text:span></text:p>
          </table:table-cell>
        </table:table-row>
        <table:table-row table:style-name="Table1.2">
          <table:table-cell table:style-name="Table1.A19" office:value-type="string">
            <text:p text:style-name="P21">a</text:p>
          </table:table-cell>
          <table:table-cell table:style-name="Table1.B19" office:value-type="string">
            <text:p text:style-name="P25"><text:span text:style-name="T49"></text:span></text:p>
          </table:table-cell>
          <table:table-cell table:style-name="Table1.A19" office:value-type="string">
            <text:p text:style-name="P24">a / <text:span text:style-name="T53">option</text:span><text:span text:style-name="T49">-a</text:span></text:p>
          </table:table-cell>
        </table:table-row>
      </table:table>
      <text:h text:style-name="Heading_20_1" text:outline-level="1"><text:soft-page-break/>Examples</text:h>
      <text:p text:style-name="First_20_Paragraph"><text:span text:style-name="T25">Following are several examples of Phi phrases. They are given </text:span><text:span text:style-name="T26">first </text:span><text:span text:style-name="T25">in English, then in romanized text, and finally in Tengwar script.</text:span></text:p>
      <text:p text:style-name="Example">My name <text:span text:style-name="T35">is Daniel<text:line-break/></text:span><text:span text:style-name="T37">phiathe</text:span><text:span text:style-name="T7"> soa mia na </text:span><text:span text:style-name="T8">thanie te phi</text:span></text:p>
      <text:p text:style-name="P15"><text:span text:style-name="T3"></text:span><text:span text:style-name="T36">⸱⸱⸱</text:span>⸱⸱</text:p>
      <text:p text:style-name="Example">I love you.</text:p>
      <text:p text:style-name="P1">mia na thi te lothea</text:p>
      <text:p text:style-name="P17">⸱⸱<text:span text:style-name="T4">⸱⸱</text:span></text:p>
      <text:p text:style-name="Example">The sky is blue.</text:p>
      <text:p text:style-name="P1">whetho na mipho te phi</text:p>
      <text:p text:style-name="Tengwar"><text:span text:style-name="T35"></text:span>⸱⸱⸱⸱</text:p>
      <text:p text:style-name="Example">They like food.</text:p>
      <text:p text:style-name="P1">lo sha na noshea te lephe</text:p>
      <text:p text:style-name="Tengwar">⸱⸱⸱⸱⸱</text:p>
      <text:p text:style-name="Example">I like it.</text:p>
      <text:p text:style-name="P1">mia na sha te lephe</text:p>
      <text:p text:style-name="Tengwar">⸱⸱⸱⸱</text:p>
      <text:p text:style-name="Example">I do no like green!</text:p>
      <text:p text:style-name="P1">ho mia na hashe te me lephe</text:p>
      <text:p text:style-name="P35">⸱⸱⸱⸱⸱⸱</text:p>
      <text:p text:style-name="P30">I liked my friend.</text:p>
      <text:p text:style-name="P1">mia na miwho soa mia te li lephe</text:p>
      <text:p text:style-name="P17"><text:span text:style-name="T11">⸱⸱</text:span><text:span text:style-name="T14"></text:span><text:span text:style-name="T1"></text:span><text:span text:style-name="T12">⸱</text:span><text:span text:style-name="T11">⸱⸱</text:span><text:span text:style-name="T12">⸱</text:span><text:span text:style-name="T11">⸱</text:span></text:p>
      <text:p text:style-name="Example">The food is ours.</text:p>
      <text:p text:style-name="P1">noshea na soa lo mia te phi</text:p>
      <text:p text:style-name="P16">⸱⸱⸱⸱⸱⸱<text:span text:style-name="T34"></text:span></text:p>
      <text:p text:style-name="Example">Our food is good.</text:p>
      <text:p text:style-name="P1">noshea soa lo mia na shishoa te phi</text:p>
      <text:p text:style-name="P14">⸱<text:span text:style-name="T24"></text:span>⸱⸱<text:span text:style-name="T2">⸱</text:span><text:span text:style-name="T2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5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18:08:24.589000000</dc:date>
    <meta:editing-duration>PT2H40M4S</meta:editing-duration>
    <meta:editing-cycles>19</meta:editing-cycles>
    <meta:generator>LibreOffice/7.1.2.2$Windows_X86_64 LibreOffice_project/8a45595d069ef5570103caea1b71cc9d82b2aae4</meta:generator>
    <meta:print-date>2021-04-13T16:42:51.068000000</meta:print-date>
    <meta:document-statistic meta:table-count="1" meta:image-count="0" meta:object-count="0" meta:page-count="6" meta:paragraph-count="111" meta:word-count="870" meta:character-count="3674" meta:non-whitespace-character-count="3180"/>
  </office:meta>
</office:document-meta>
</file>