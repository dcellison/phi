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1.A" style:family="table-column">
      <style:table-column-properties style:column-width="1.35in"/>
    </style:style>
    <style:style style:name="Table1.B" style:family="table-column">
      <style:table-column-properties style:column-width="1.3583in"/>
    </style:style>
    <style:style style:name="Table1.C" style:family="table-column">
      <style:table-column-properties style:column-width="1.3542in"/>
    </style:style>
    <style:style style:name="Table1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1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style:min-row-height="0.0007in" fo:keep-together="auto"/>
    </style:style>
    <style:style style:name="Table1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3" style:family="table-row">
      <style:table-row-properties style:min-row-height="0.0007in"/>
    </style:style>
    <style:style style:name="Table1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>
      <style:table-row-properties style:min-row-height="0.0007in"/>
    </style:style>
    <style:style style:name="Table1.5" style:family="table-row">
      <style:table-row-properties style:min-row-height="0.0007in"/>
    </style:style>
    <style:style style:name="Table1.6" style:family="table-row">
      <style:table-row-properties style:min-row-height="0.0007in"/>
    </style:style>
    <style:style style:name="Table1.7" style:family="table-row">
      <style:table-row-properties style:min-row-height="0.0007in"/>
    </style:style>
    <style:style style:name="Table1.8" style:family="table-row">
      <style:table-row-properties style:min-row-height="0.0007in"/>
    </style:style>
    <style:style style:name="Table1.9" style:family="table-row">
      <style:table-row-properties style:min-row-height="0.0007in"/>
    </style:style>
    <style:style style:name="Table1.10" style:family="table-row">
      <style:table-row-properties style:min-row-height="0.0007in"/>
    </style:style>
    <style:style style:name="Table1.11" style:family="table-row">
      <style:table-row-properties style:min-row-height="0.0007in"/>
    </style:style>
    <style:style style:name="Table1.12" style:family="table-row">
      <style:table-row-properties style:min-row-height="0.0007in"/>
    </style:style>
    <style:style style:name="Table1.13" style:family="table-row">
      <style:table-row-properties style:min-row-height="0.0007in"/>
    </style:style>
    <style:style style:name="Table1.14" style:family="table-row">
      <style:table-row-properties style:min-row-height="0.0007in"/>
    </style:style>
    <style:style style:name="Table1.B14" style:family="table-cell">
      <style:table-cell-properties style:vertical-align="middle" fo:background-color="transparent" fo:padding="0in" fo:border-left="none" fo:border-right="none" fo:border-top="none" fo:border-bottom="0.75pt solid #666666" style:writing-mode="page">
        <style:background-image/>
      </style:table-cell-properties>
    </style:style>
    <style:style style:name="Table1.15" style:family="table-row">
      <style:table-row-properties style:min-row-height="0.0007in"/>
    </style:style>
    <style:style style:name="Table2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2.A" style:family="table-column">
      <style:table-column-properties style:column-width="1.35in"/>
    </style:style>
    <style:style style:name="Table2.B" style:family="table-column">
      <style:table-column-properties style:column-width="1.3583in"/>
    </style:style>
    <style:style style:name="Table2.C" style:family="table-column">
      <style:table-column-properties style:column-width="1.3542in"/>
    </style:style>
    <style:style style:name="Table2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2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2" style:family="table-row">
      <style:table-row-properties style:min-row-height="0.0007in" fo:keep-together="auto"/>
    </style:style>
    <style:style style:name="Table2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3" style:family="table-row">
      <style:table-row-properties style:min-row-height="0.0007in"/>
    </style:style>
    <style:style style:name="Table2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4" style:family="table-row">
      <style:table-row-properties style:min-row-height="0.0007in"/>
    </style:style>
    <style:style style:name="Table2.A5" style:family="table-cell">
      <style:table-cell-properties style:vertical-align="middle" fo:background-color="#eeeeee" fo:padding="0in" fo:border="0.75pt solid #666666" style:writing-mode="page">
        <style:background-image/>
      </style:table-cell-properties>
    </style:style>
    <style:style style:name="Table2.B5" style:family="table-cell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Example">
      <style:text-properties fo:font-style="italic" style:font-style-asian="italic" style:font-style-complex="italic"/>
    </style:style>
    <style:style style:name="P3" style:family="paragraph" style:parent-style-name="Footnote">
      <style:text-properties fo:font-style="italic" style:font-style-asian="italic" style:font-style-complex="italic"/>
    </style:style>
    <style:style style:name="P4" style:family="paragraph" style:parent-style-name="Footnote">
      <style:text-properties fo:font-style="italic" officeooo:rsid="004f5cd4" officeooo:paragraph-rsid="00631a01" style:font-style-asian="italic" style:font-style-complex="italic"/>
    </style:style>
    <style:style style:name="P5" style:family="paragraph" style:parent-style-name="Footnote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6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1" fo:font-size="24pt" fo:font-weight="normal" style:font-size-asian="21pt" style:font-weight-asian="normal" style:font-size-complex="24pt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8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1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12" style:family="paragraph" style:parent-style-name="Title">
      <style:paragraph-properties fo:margin-top="0in" fo:margin-bottom="0in" style:contextual-spacing="false"/>
      <style:text-properties style:font-name="Palatino Linotype1" fo:font-size="96pt" fo:font-weight="normal" officeooo:paragraph-rsid="002a6fea" style:font-size-asian="96pt" style:font-weight-asian="normal" style:font-size-complex="96pt" style:font-weight-complex="normal"/>
    </style:style>
    <style:style style:name="P13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4f26e4"/>
    </style:style>
    <style:style style:name="P14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530507"/>
    </style:style>
    <style:style style:name="P15" style:family="paragraph" style:parent-style-name="Tengwar">
      <style:text-properties officeooo:paragraph-rsid="003b443c"/>
    </style:style>
    <style:style style:name="P16" style:family="paragraph" style:parent-style-name="Tengwar">
      <style:text-properties officeooo:rsid="002f6327" officeooo:paragraph-rsid="002f6327"/>
    </style:style>
    <style:style style:name="P17" style:family="paragraph" style:parent-style-name="Tengwar">
      <style:text-properties officeooo:paragraph-rsid="002f6327"/>
    </style:style>
    <style:style style:name="P18" style:family="paragraph" style:parent-style-name="Tengwar">
      <style:text-properties officeooo:paragraph-rsid="00405c24"/>
    </style:style>
    <style:style style:name="P19" style:family="paragraph" style:parent-style-name="Tengwar">
      <style:text-properties officeooo:paragraph-rsid="004f26e4"/>
    </style:style>
    <style:style style:name="P20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f26e4" officeooo:paragraph-rsid="004f2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94d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67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ca095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467f50" officeooo:paragraph-rsid="00467f50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51e91f" officeooo:paragraph-rsid="0051e91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1" style:family="paragraph" style:parent-style-name="Example">
      <style:paragraph-properties fo:break-before="page"/>
      <style:text-properties officeooo:paragraph-rsid="004f26e4"/>
    </style:style>
    <style:style style:name="P32" style:family="paragraph" style:parent-style-name="Table">
      <style:paragraph-properties fo:break-before="page" fo:keep-with-next="always"/>
    </style:style>
    <style:style style:name="P33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1" fo:font-size="36pt" fo:font-weight="normal" officeooo:paragraph-rsid="002a6fea" style:font-size-asian="31.5pt" style:font-weight-asian="normal" style:font-size-complex="36pt" style:font-weight-complex="normal"/>
    </style:style>
    <style:style style:name="P34" style:family="paragraph" style:parent-style-name="Heading_20_1" style:list-style-name="">
      <style:text-properties officeooo:paragraph-rsid="005fdfae"/>
    </style:style>
    <style:style style:name="P35" style:family="paragraph" style:parent-style-name="Heading_20_1" style:master-page-name="Standard">
      <style:paragraph-properties style:page-number="auto"/>
    </style:style>
    <style:style style:name="P36" style:family="paragraph" style:parent-style-name="Heading_20_1">
      <style:paragraph-properties fo:break-before="page"/>
      <style:text-properties officeooo:rsid="003b443c" officeooo:paragraph-rsid="003b443c"/>
    </style:style>
    <style:style style:name="P37" style:family="paragraph" style:parent-style-name="Heading_20_1">
      <style:paragraph-properties fo:break-before="page"/>
      <style:text-properties officeooo:paragraph-rsid="005fdfae"/>
    </style:style>
    <style:style style:name="T1" style:family="text">
      <style:text-properties officeooo:rsid="005fdfae"/>
    </style:style>
    <style:style style:name="T2" style:family="text">
      <style:text-properties style:font-name="Tengwar Telcontar" fo:font-size="22pt" fo:letter-spacing="normal" fo:font-style="normal" officeooo:rsid="002f6327" style:font-size-asian="22pt" style:font-style-asian="normal" style:font-size-complex="22pt" style:font-style-complex="normal"/>
    </style:style>
    <style:style style:name="T3" style:family="text">
      <style:text-properties style:font-name="Tengwar Telcontar" fo:font-size="22pt" fo:letter-spacing="normal" officeooo:rsid="002fa56f" style:font-size-asian="22pt" style:font-size-complex="22pt"/>
    </style:style>
    <style:style style:name="T4" style:family="text">
      <style:text-properties style:font-name="Tengwar Telcontar" fo:font-size="22pt" fo:letter-spacing="normal" officeooo:rsid="00340f5e" style:font-size-asian="22pt" style:font-size-complex="22pt"/>
    </style:style>
    <style:style style:name="T5" style:family="text">
      <style:text-properties officeooo:rsid="001f77f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cbf0c" style:font-style-asian="italic" style:font-style-complex="italic"/>
    </style:style>
    <style:style style:name="T8" style:family="text">
      <style:text-properties fo:font-style="italic" officeooo:rsid="0032b8f3" style:font-style-asian="italic" style:font-style-complex="italic"/>
    </style:style>
    <style:style style:name="T9" style:family="text">
      <style:text-properties fo:font-style="italic" officeooo:rsid="002f6327" style:font-style-asian="italic" style:font-style-complex="italic"/>
    </style:style>
    <style:style style:name="T10" style:family="text">
      <style:text-properties fo:font-style="italic" officeooo:rsid="00434435" style:font-style-asian="italic" style:font-style-complex="italic"/>
    </style:style>
    <style:style style:name="T11" style:family="text">
      <style:text-properties fo:font-style="italic" officeooo:rsid="00530507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32f95" style:font-style-asian="normal" style:font-style-complex="normal"/>
    </style:style>
    <style:style style:name="T14" style:family="text">
      <style:text-properties fo:font-style="normal" officeooo:rsid="002b0442" style:font-style-asian="normal" style:font-style-complex="normal"/>
    </style:style>
    <style:style style:name="T15" style:family="text">
      <style:text-properties fo:font-style="normal" officeooo:rsid="002f6327" style:font-style-asian="normal" style:font-style-complex="normal"/>
    </style:style>
    <style:style style:name="T16" style:family="text">
      <style:text-properties fo:font-style="normal" officeooo:rsid="00434435" style:font-style-asian="normal" style:font-style-complex="normal"/>
    </style:style>
    <style:style style:name="T17" style:family="text">
      <style:text-properties fo:font-style="normal" officeooo:rsid="004ca095" style:font-style-asian="normal" style:font-style-complex="normal"/>
    </style:style>
    <style:style style:name="T18" style:family="text">
      <style:text-properties fo:font-style="normal" officeooo:rsid="004e5177" style:font-style-asian="normal" style:font-style-complex="normal"/>
    </style:style>
    <style:style style:name="T19" style:family="text">
      <style:text-properties fo:font-style="normal" officeooo:rsid="0041eff8" style:font-style-asian="normal" style:font-style-complex="normal"/>
    </style:style>
    <style:style style:name="T20" style:family="text">
      <style:text-properties fo:font-style="normal" officeooo:rsid="004f26e4" style:font-style-asian="normal" style:font-style-complex="normal"/>
    </style:style>
    <style:style style:name="T21" style:family="text">
      <style:text-properties fo:font-style="normal" officeooo:rsid="0051e91f" style:font-style-asian="normal" style:font-style-complex="normal"/>
    </style:style>
    <style:style style:name="T22" style:family="text">
      <style:text-properties fo:font-style="normal" officeooo:rsid="00530507" style:font-style-asian="normal" style:font-style-complex="normal"/>
    </style:style>
    <style:style style:name="T23" style:family="text">
      <style:text-properties fo:font-style="normal" officeooo:rsid="0054cfe5" style:font-style-asian="normal" style:font-style-complex="normal"/>
    </style:style>
    <style:style style:name="T24" style:family="text">
      <style:text-properties fo:font-style="normal" officeooo:rsid="005648a8" style:font-style-asian="normal" style:font-style-complex="normal"/>
    </style:style>
    <style:style style:name="T25" style:family="text">
      <style:text-properties officeooo:rsid="0023afad"/>
    </style:style>
    <style:style style:name="T26" style:family="text">
      <style:text-properties style:font-name="Palatino Linotype1" fo:font-size="12pt" fo:letter-spacing="normal" officeooo:rsid="001f77fd" style:font-size-asian="10.5pt" style:font-size-complex="12pt"/>
    </style:style>
    <style:style style:name="T27" style:family="text">
      <style:text-properties style:font-name="Palatino Linotype1" fo:font-size="12pt" fo:letter-spacing="normal" officeooo:rsid="003079ad" style:font-size-asian="10.5pt" style:font-size-complex="12pt"/>
    </style:style>
    <style:style style:name="T28" style:family="text">
      <style:text-properties style:font-name="Palatino Linotype1" fo:font-size="12pt" officeooo:rsid="002aebfd" style:font-size-asian="10.5pt" style:font-size-complex="12pt"/>
    </style:style>
    <style:style style:name="T29" style:family="text">
      <style:text-properties style:font-name="Palatino Linotype1" fo:font-size="12pt" officeooo:rsid="0054cfe5" style:font-size-asian="10.5pt" style:font-size-complex="12pt"/>
    </style:style>
    <style:style style:name="T30" style:family="text">
      <style:text-properties style:font-name="Palatino Linotype1" fo:font-size="12pt" officeooo:rsid="005a0109" style:font-size-asian="10.5pt" style:font-size-complex="12pt"/>
    </style:style>
    <style:style style:name="T31" style:family="text">
      <style:text-properties style:font-name="Palatino Linotype1" fo:font-size="12pt" officeooo:rsid="005bff1b" style:font-size-asian="10.5pt" style:font-size-complex="12pt"/>
    </style:style>
    <style:style style:name="T32" style:family="text">
      <style:text-properties style:font-name="Palatino Linotype1" fo:font-size="12pt" fo:font-style="italic" officeooo:rsid="002aebfd" style:font-size-asian="10.5pt" style:font-style-asian="italic" style:font-size-complex="12pt" style:font-style-complex="italic"/>
    </style:style>
    <style:style style:name="T33" style:family="text">
      <style:text-properties style:font-name="Palatino Linotype1" fo:font-size="12pt" fo:font-style="italic" officeooo:rsid="005bff1b" style:font-size-asian="10.5pt" style:font-style-asian="italic" style:font-size-complex="12pt" style:font-style-complex="italic"/>
    </style:style>
    <style:style style:name="T34" style:family="text">
      <style:text-properties style:font-name="Palatino Linotype1" fo:font-size="12pt" fo:font-style="normal" officeooo:rsid="002aebfd" style:font-size-asian="10.5pt" style:font-style-asian="normal" style:font-size-complex="12pt" style:font-style-complex="normal"/>
    </style:style>
    <style:style style:name="T35" style:family="text">
      <style:text-properties officeooo:rsid="0028e509"/>
    </style:style>
    <style:style style:name="T36" style:family="text">
      <style:text-properties officeooo:rsid="002f6327"/>
    </style:style>
    <style:style style:name="T37" style:family="text">
      <style:text-properties officeooo:rsid="0032b8f3"/>
    </style:style>
    <style:style style:name="T38" style:family="text">
      <style:text-properties style:font-name="Palatino Linotype" fo:font-style="italic" officeooo:rsid="00340f5e" style:font-style-asian="italic" style:font-style-complex="italic"/>
    </style:style>
    <style:style style:name="T39" style:family="text">
      <style:text-properties style:font-name="Palatino Linotype" officeooo:rsid="003ee6d6"/>
    </style:style>
    <style:style style:name="T40" style:family="text">
      <style:text-properties style:font-name="Palatino Linotype" officeooo:rsid="004ca095"/>
    </style:style>
    <style:style style:name="T41" style:family="text">
      <style:text-properties style:font-name="Palatino Linotype" fo:font-size="10pt" officeooo:rsid="0051e91f" style:font-size-asian="10pt" style:font-size-complex="10pt"/>
    </style:style>
    <style:style style:name="T42" style:family="text">
      <style:text-properties style:font-name="Palatino Linotype" fo:font-size="10pt" officeooo:rsid="00631a01" style:font-size-asian="10pt" style:font-size-complex="10pt"/>
    </style:style>
    <style:style style:name="T43" style:family="text">
      <style:text-properties style:font-name="Palatino Linotype" fo:font-size="10pt" fo:font-style="normal" officeooo:rsid="0051e91f" style:font-size-asian="10pt" style:font-style-asian="normal" style:font-size-complex="10pt" style:font-style-complex="normal"/>
    </style:style>
    <style:style style:name="T44" style:family="text">
      <style:text-properties style:font-name="Palatino Linotype" officeooo:rsid="005bff1b"/>
    </style:style>
    <style:style style:name="T45" style:family="text">
      <style:text-properties style:font-name="Palatino Linotype" officeooo:rsid="005dfc65"/>
    </style:style>
    <style:style style:name="T46" style:family="text">
      <style:text-properties officeooo:rsid="003eb40c"/>
    </style:style>
    <style:style style:name="T47" style:family="text">
      <style:text-properties officeooo:rsid="003ee6d6"/>
    </style:style>
    <style:style style:name="T48" style:family="text">
      <style:text-properties fo:font-variant="small-caps" style:font-name="Palatino Linotype1" fo:font-size="12pt" officeooo:rsid="002aebfd" style:font-size-asian="10.5pt" style:font-size-complex="12pt"/>
    </style:style>
    <style:style style:name="T49" style:family="text">
      <style:text-properties officeooo:rsid="0041eff8"/>
    </style:style>
    <style:style style:name="T50" style:family="text">
      <style:text-properties officeooo:rsid="00434435"/>
    </style:style>
    <style:style style:name="T51" style:family="text">
      <style:text-properties officeooo:rsid="004a8779"/>
    </style:style>
    <style:style style:name="T52" style:family="text">
      <style:text-properties officeooo:rsid="004ca095"/>
    </style:style>
    <style:style style:name="T53" style:family="text">
      <style:text-properties officeooo:rsid="004e5177"/>
    </style:style>
    <style:style style:name="T54" style:family="text">
      <style:text-properties officeooo:rsid="0050274c"/>
    </style:style>
    <style:style style:name="T55" style:family="text">
      <style:text-properties officeooo:rsid="0051e91f"/>
    </style:style>
    <style:style style:name="T56" style:family="text">
      <style:text-properties officeooo:rsid="00631a01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2">φ</text:p>
      <text:p text:style-name="P6"/>
      <text:p text:style-name="P8">Phi</text:p>
      <text:p text:style-name="P9">A constructed language</text:p>
      <text:p text:style-name="P7"/>
      <text:p text:style-name="P10">Daniel Ellison</text:p>
      <text:p text:style-name="P11"/>
      <text:p text:style-name="P10"><text:date style:data-style-name="N76" text:date-value="2021-04-13T20:06:09.504000199">April 13, 2021</text:date></text:p>
      <text:h text:style-name="P35" text:outline-level="1">Introduction</text:h>
      <text:p text:style-name="First_20_Paragraph"><text:span text:style-name="T48">Phi</text:span><text:span text:style-name="T28"> is a constructed language. </text:span><text:span text:style-name="T30">A constructed language is one whose phonology, grammar, and vocabulary, instead of having developed naturally, are consciously devised</text:span><text:span text:style-name="T30"><text:note text:id="ftn1" text:note-class="footnote"><text:note-citation>1</text:note-citation><text:note-body><text:p text:style-name="Footnote">https://en.wikipedia.org/wiki/Constructed_language</text:p></text:note-body></text:note></text:span><text:span text:style-name="T30">. </text:span><text:span text:style-name="T29">The sound of </text:span><text:span text:style-name="T31">the </text:span><text:span text:style-name="T28">name </text:span><text:span text:style-name="T33">Phi</text:span><text:span text:style-name="T28"> embodies the simplicity and softness of the language itself. </text:span><text:span text:style-name="T32">Phi</text:span><text:span text:style-name="T34"> (Φ) is also beauty in mathematics. It is</text:span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12"> – </text:span><text:span text:style-name="T14">Wiktionary</text:span><text:span text:style-name="T14"><text:note text:id="ftn2" text:note-class="footnote"><text:note-citation>2</text:note-citation><text:note-body><text:p text:style-name="Footnote">https://en.wiktionary.org/wiki/%CF%86</text:p></text:note-body></text:note></text:span></text:p>
      <text:p text:style-name="Standard">It is thought that the value of <text:span text:style-name="T7">p</text:span><text:span text:style-name="T6">hi</text:span> is one of the fundamental characteristics of nature; in the language Phi, nature is fundamental to its being. Listening to spoken Phi one <text:span text:style-name="T44">is </text:span><text:span text:style-name="T45">sometimes</text:span> reminded of the sounds of the natural world. There is also a musicality and rhythm to sentences in the language.</text:p>
      <text:h text:style-name="P36" text:outline-level="1">The Tengwar</text:h>
      <text:p text:style-name="First_20_Paragraph">Phi can be written in <text:span text:style-name="T40">either</text:span> of two ways: using the standard Latin alphabet or the Tengwar script. <text:span text:style-name="T52">Tengwar was</text:span> invented by J. R. R. Tolkien and <text:span text:style-name="T46">described first in </text:span>Appendix E of <text:span text:style-name="T46">the third book in his trilogy, </text:span><text:span text:style-name="T6">The Lord of the Rings</text:span>. <text:span text:style-name="T46">There are numerous sources of information </text:span><text:span text:style-name="T47">available </text:span><text:span text:style-name="T39">concerning </text:span><text:span text:style-name="T46">the Tengwar so details of the script will not be explored here.</text:span></text:p>
      <text:p text:style-name="P13">The look and feel of the Tengwar characters (<text:span text:style-name="T6">tengwa</text:span>) and its diacritical marks (<text:span text:style-name="T6">tehta</text:span>) <text:span text:style-name="T49">match the idea</text:span><text:span text:style-name="T52">l</text:span><text:span text:style-name="T49">s and philosoph</text:span><text:span text:style-name="T52">ies</text:span><text:span text:style-name="T49"> behind this language. Phi has a small set of consonants and vowels so it is relatively straightforward to map its </text:span><text:span text:style-name="T20">graphemes</text:span><text:span text:style-name="T49"> to Tengwar characters.</text:span><text:span text:style-name="T50"> The </text:span><text:span text:style-name="T53">Unicode </text:span><text:span text:style-name="T50">font </text:span><text:span text:style-name="T10">Tengwar Telcontar</text:span><text:span text:style-name="T16"><text:note text:id="ftn3" text:note-class="footnote"><text:note-citation>3</text:note-citation><text:note-body><text:p text:style-name="P5">http://freetengwar.sourceforge.net/tengtelc.html</text:p></text:note-body></text:note></text:span><text:span text:style-name="T16"> is used in this manual to render Phi text in Tengwar script. </text:span><text:span text:style-name="T17">A </text:span><text:span text:style-name="T18">custom keyboard layout</text:span><text:span text:style-name="T18"><text:note text:id="ftn4" text:note-class="footnote"><text:note-citation>4</text:note-citation><text:note-body><text:p text:style-name="P3">http://freetengwar.sourceforge.net/keylayouts.html</text:p></text:note-body></text:note></text:span><text:span text:style-name="T18"> was </text:span><text:span text:style-name="T24">employed</text:span><text:span text:style-name="T18"> to facilitate typing the Teng</text:span><text:span text:style-name="T24">w</text:span><text:span text:style-name="T18">ar characters.</text:span></text:p>
      <text:p text:style-name="P14"><text:span text:style-name="T19">Table </text:span><text:span text:style-name="T23">1 </text:span><text:span text:style-name="T19">outlines </text:span><text:span text:style-name="T16">th</text:span><text:span text:style-name="T18">e</text:span><text:span text:style-name="T16"> mapping </text:span><text:span text:style-name="T18">between the </text:span><text:span text:style-name="T20">graphemes</text:span><text:span text:style-name="T18"> used in Phi and corresponding Tengwar characters, </text:span><text:span text:style-name="T20">as well as the key</text:span><text:span text:style-name="T21">s necessary to </text:span><text:span text:style-name="T20">produce the characters using the font and keboard layout mentioned previously. </text:span><text:span text:style-name="T21">An application or utility that </text:span><text:span text:style-name="T22">supports Graphite fonts</text:span><text:span text:style-name="T22"><text:note text:id="ftn5" text:note-class="footnote"><text:note-citation>5</text:note-citation><text:note-body><text:p text:style-name="P3">https://scripts.sil.org/cms/scripts/page.php?site_id=projects&amp;item_id=graphite_fonts</text:p></text:note-body></text:note></text:span><text:span text:style-name="T22"> is required for the font to render correctly. This manual was produced using LibreOffice Writer v7.1.2.2, which renders </text:span><text:span text:style-name="T11">Tengwar Telcontar</text:span><text:span text:style-name="T22"> properly. A link to details of this requirement can be found in the first footnote below.</text:span></text:p>
      <text:p text:style-name="P32">Table <text:sequence text:ref-name="refTable0" text:name="Table" text:formula="ooow:Table+1" style:num-format="1">1</text:sequence>: Phi grapheme to Tengwar mapping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591867600208">
          <table:table-cell table:style-name="Table1.A1" office:value-type="string">
            <text:p text:style-name="P20">Grapheme</text:p>
          </table:table-cell>
          <table:table-cell table:style-name="Table1.B1" office:value-type="string">
            <text:p text:style-name="P21">Tengwa</text:p>
          </table:table-cell>
          <table:table-cell table:style-name="Table1.A1" office:value-type="string">
            <text:p text:style-name="P22">Keypress</text:p>
          </table:table-cell>
        </table:table-row>
        <table:table-row table:style-name="Table1.2">
          <table:table-cell table:style-name="Table1.A2" office:value-type="string">
            <text:p text:style-name="P23">p</text:p>
          </table:table-cell>
          <table:table-cell table:style-name="Table1.B2" office:value-type="string">
            <text:p text:style-name="P29"></text:p>
          </table:table-cell>
          <table:table-cell table:style-name="Table1.A2" office:value-type="string">
            <text:p text:style-name="P24">p</text:p>
          </table:table-cell>
        </table:table-row>
        <table:table-row table:style-name="Table1.3">
          <table:table-cell table:style-name="Table1.A3" office:value-type="string">
            <text:p text:style-name="P23">t</text:p>
          </table:table-cell>
          <table:table-cell table:style-name="Table1.B3" office:value-type="string">
            <text:p text:style-name="P29"></text:p>
          </table:table-cell>
          <table:table-cell table:style-name="Table1.A3" office:value-type="string">
            <text:p text:style-name="P24">t</text:p>
          </table:table-cell>
        </table:table-row>
        <table:table-row table:style-name="Table1.4">
          <table:table-cell table:style-name="Table1.A2" office:value-type="string">
            <text:p text:style-name="P23">m</text:p>
          </table:table-cell>
          <table:table-cell table:style-name="Table1.B2" office:value-type="string">
            <text:p text:style-name="P29"></text:p>
          </table:table-cell>
          <table:table-cell table:style-name="Table1.A2" office:value-type="string">
            <text:p text:style-name="P24">m</text:p>
          </table:table-cell>
        </table:table-row>
        <table:table-row table:style-name="Table1.5">
          <table:table-cell table:style-name="Table1.A3" office:value-type="string">
            <text:p text:style-name="P23">n</text:p>
          </table:table-cell>
          <table:table-cell table:style-name="Table1.B3" office:value-type="string">
            <text:p text:style-name="P29"></text:p>
          </table:table-cell>
          <table:table-cell table:style-name="Table1.A3" office:value-type="string">
            <text:p text:style-name="P24">n</text:p>
          </table:table-cell>
        </table:table-row>
        <table:table-row table:style-name="Table1.6">
          <table:table-cell table:style-name="Table1.A2" office:value-type="string">
            <text:p text:style-name="P23">r</text:p>
          </table:table-cell>
          <table:table-cell table:style-name="Table1.B2" office:value-type="string">
            <text:p text:style-name="P29"></text:p>
          </table:table-cell>
          <table:table-cell table:style-name="Table1.A2" office:value-type="string">
            <text:p text:style-name="P25">shift-r</text:p>
          </table:table-cell>
        </table:table-row>
        <table:table-row table:style-name="Table1.7">
          <table:table-cell table:style-name="Table1.A3" office:value-type="string">
            <text:p text:style-name="P23">s</text:p>
          </table:table-cell>
          <table:table-cell table:style-name="Table1.B3" office:value-type="string">
            <text:p text:style-name="P30"></text:p>
          </table:table-cell>
          <table:table-cell table:style-name="Table1.A3" office:value-type="string">
            <text:p text:style-name="P24">s</text:p>
          </table:table-cell>
        </table:table-row>
        <table:table-row table:style-name="Table1.8">
          <table:table-cell table:style-name="Table1.A2" office:value-type="string">
            <text:p text:style-name="P23">s</text:p>
          </table:table-cell>
          <table:table-cell table:style-name="Table1.B2" office:value-type="string">
            <text:p text:style-name="P29"></text:p>
          </table:table-cell>
          <table:table-cell table:style-name="Table1.A2" office:value-type="string">
            <text:p text:style-name="P24">shift-s</text:p>
          </table:table-cell>
        </table:table-row>
        <table:table-row table:style-name="Table1.9">
          <table:table-cell table:style-name="Table1.A3" office:value-type="string">
            <text:p text:style-name="P23">h</text:p>
          </table:table-cell>
          <table:table-cell table:style-name="Table1.B3" office:value-type="string">
            <text:p text:style-name="P29"></text:p>
          </table:table-cell>
          <table:table-cell table:style-name="Table1.A3" office:value-type="string">
            <text:p text:style-name="P24">h</text:p>
          </table:table-cell>
        </table:table-row>
        <table:table-row table:style-name="Table1.10">
          <table:table-cell table:style-name="Table1.A2" office:value-type="string">
            <text:p text:style-name="P23">l</text:p>
          </table:table-cell>
          <table:table-cell table:style-name="Table1.B2" office:value-type="string">
            <text:p text:style-name="P29"></text:p>
          </table:table-cell>
          <table:table-cell table:style-name="Table1.A2" office:value-type="string">
            <text:p text:style-name="P24">l</text:p>
          </table:table-cell>
        </table:table-row>
        <table:table-row table:style-name="Table1.11">
          <table:table-cell table:style-name="Table1.A3" office:value-type="string">
            <text:p text:style-name="P23">w</text:p>
          </table:table-cell>
          <table:table-cell table:style-name="Table1.B3" office:value-type="string">
            <text:p text:style-name="P29"></text:p>
          </table:table-cell>
          <table:table-cell table:style-name="Table1.A3" office:value-type="string">
            <text:p text:style-name="P28">w</text:p>
          </table:table-cell>
        </table:table-row>
        <table:table-row table:style-name="Table1.12">
          <table:table-cell table:style-name="Table1.A2" office:value-type="string">
            <text:p text:style-name="P23">ph</text:p>
          </table:table-cell>
          <table:table-cell table:style-name="Table1.B2" office:value-type="string">
            <text:p text:style-name="P29"></text:p>
          </table:table-cell>
          <table:table-cell table:style-name="Table1.A2" office:value-type="string">
            <text:p text:style-name="P24">shift-p</text:p>
          </table:table-cell>
        </table:table-row>
        <table:table-row table:style-name="Table1.13">
          <table:table-cell table:style-name="Table1.A3" office:value-type="string">
            <text:p text:style-name="P23">th</text:p>
          </table:table-cell>
          <table:table-cell table:style-name="Table1.B3" office:value-type="string">
            <text:p text:style-name="P29"></text:p>
          </table:table-cell>
          <table:table-cell table:style-name="Table1.A3" office:value-type="string">
            <text:p text:style-name="P24">shift-t</text:p>
          </table:table-cell>
        </table:table-row>
        <table:table-row table:style-name="Table1.14">
          <table:table-cell table:style-name="Table1.A2" office:value-type="string">
            <text:p text:style-name="P23">sh</text:p>
          </table:table-cell>
          <table:table-cell table:style-name="Table1.B14" office:value-type="string">
            <text:p text:style-name="P29"></text:p>
          </table:table-cell>
          <table:table-cell table:style-name="Table1.A2" office:value-type="string">
            <text:p text:style-name="P24">shift-c</text:p>
          </table:table-cell>
        </table:table-row>
        <table:table-row table:style-name="Table1.15">
          <table:table-cell table:style-name="Table1.A3" office:value-type="string">
            <text:p text:style-name="P23">wh</text:p>
          </table:table-cell>
          <table:table-cell table:style-name="Table1.B3" office:value-type="string">
            <text:p text:style-name="P29"></text:p>
          </table:table-cell>
          <table:table-cell table:style-name="Table1.A3" office:value-type="string">
            <text:p text:style-name="P24">shift-k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 table:style-name="TableLine1591867600480">
            <table:table-cell table:style-name="Table2.A1" office:value-type="string">
              <text:p text:style-name="P20">Grapheme</text:p>
            </table:table-cell>
            <table:table-cell table:style-name="Table2.B1" office:value-type="string">
              <text:p text:style-name="P21">Te<text:span text:style-name="T56">hta</text:span></text:p>
            </table:table-cell>
            <table:table-cell table:style-name="Table2.A1" office:value-type="string">
              <text:p text:style-name="P22">Keypres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3">i</text:p>
          </table:table-cell>
          <table:table-cell table:style-name="Table2.B2" office:value-type="string">
            <text:p text:style-name="P29"> <text:s/><text:span text:style-name="T51"></text:span></text:p>
          </table:table-cell>
          <table:table-cell table:style-name="Table2.A2" office:value-type="string">
            <text:p text:style-name="P28">i / <text:span text:style-name="T55">option</text:span><text:span text:style-name="T51">-i</text:span><text:span text:style-name="T51"><text:note text:id="ftn6" text:note-class="footnote"><text:note-citation>6</text:note-citation><text:note-body><text:p text:style-name="P4">Keypresses <text:span text:style-name="T54">for the diacriticals </text:span>are given for <text:span text:style-name="T41">macOS</text:span>. <text:span text:style-name="T42">U</text:span><text:span text:style-name="T41">se </text:span><text:span text:style-name="T43">ctrl-alt</text:span><text:span text:style-name="T41"> </text:span><text:span text:style-name="T42">on Windows </text:span><text:span text:style-name="T41">instead of </text:span><text:span text:style-name="T43">option</text:span><text:span text:style-name="T41">.</text:span></text:p></text:note-body></text:note></text:span></text:p>
          </table:table-cell>
        </table:table-row>
        <table:table-row table:style-name="Table2.3">
          <table:table-cell table:style-name="Table2.A3" office:value-type="string">
            <text:p text:style-name="P23">e</text:p>
          </table:table-cell>
          <table:table-cell table:style-name="Table2.B3" office:value-type="string">
            <text:p text:style-name="P29"> <text:s/><text:span text:style-name="T51"></text:span></text:p>
          </table:table-cell>
          <table:table-cell table:style-name="Table2.A3" office:value-type="string">
            <text:p text:style-name="P27">e / <text:span text:style-name="T55">option</text:span><text:span text:style-name="T51">-e</text:span></text:p>
          </table:table-cell>
        </table:table-row>
        <table:table-row table:style-name="Table2.4">
          <table:table-cell table:style-name="Table2.A2" office:value-type="string">
            <text:p text:style-name="P23">o</text:p>
          </table:table-cell>
          <table:table-cell table:style-name="Table2.B2" office:value-type="string">
            <text:p text:style-name="P29"> <text:s/><text:span text:style-name="T51"></text:span></text:p>
          </table:table-cell>
          <table:table-cell table:style-name="Table2.A2" office:value-type="string">
            <text:p text:style-name="P27">o / <text:span text:style-name="T55">option</text:span><text:span text:style-name="T51">-o</text:span></text:p>
          </table:table-cell>
        </table:table-row>
        <table:table-row table:style-name="Table2.2">
          <table:table-cell table:style-name="Table2.A5" office:value-type="string">
            <text:p text:style-name="P23">a</text:p>
          </table:table-cell>
          <table:table-cell table:style-name="Table2.B5" office:value-type="string">
            <text:p text:style-name="P29"> <text:s/><text:span text:style-name="T51"></text:span></text:p>
          </table:table-cell>
          <table:table-cell table:style-name="Table2.A5" office:value-type="string">
            <text:p text:style-name="P26">a / <text:span text:style-name="T55">option</text:span><text:span text:style-name="T51">-a</text:span></text:p>
          </table:table-cell>
        </table:table-row>
      </table:table>
      <text:h text:style-name="P34" text:outline-level="1"/>
      <text:h text:style-name="P37" text:outline-level="1">Examples</text:h>
      <text:p text:style-name="First_20_Paragraph"><text:span text:style-name="T26">Following are several examples of Phi phrases. They are given </text:span><text:span text:style-name="T27">first </text:span><text:span text:style-name="T26">in English, then in romanized text, and finally in Tengwar script.</text:span></text:p>
      <text:p text:style-name="Example">My name <text:span text:style-name="T36">is Daniel<text:line-break/></text:span><text:span text:style-name="T38">phiathe</text:span><text:span text:style-name="T8"> soa mia na </text:span><text:span text:style-name="T9">thanie te phi</text:span></text:p>
      <text:p text:style-name="P16"><text:span text:style-name="T4"></text:span><text:span text:style-name="T37">⸱⸱⸱</text:span>⸱⸱</text:p>
      <text:p text:style-name="Example">I love you.</text:p>
      <text:p text:style-name="P2">mia na thi te lothea</text:p>
      <text:p text:style-name="P18">⸱⸱<text:span text:style-name="T5">⸱⸱</text:span></text:p>
      <text:p text:style-name="Example">The sky is blue.</text:p>
      <text:p text:style-name="P2">whetho na mipho te phi</text:p>
      <text:p text:style-name="Tengwar"><text:span text:style-name="T36"></text:span>⸱⸱⸱⸱</text:p>
      <text:p text:style-name="Example">They like food.</text:p>
      <text:p text:style-name="P2">lo sha na noshea te lephe</text:p>
      <text:p text:style-name="Tengwar">⸱⸱⸱⸱⸱</text:p>
      <text:p text:style-name="Example">I like it.</text:p>
      <text:p text:style-name="P2">mia na sha te lephe</text:p>
      <text:p text:style-name="Tengwar">⸱⸱⸱⸱</text:p>
      <text:p text:style-name="Example">I do no like green!</text:p>
      <text:p text:style-name="P2">ho mia na hashe te me lephe</text:p>
      <text:p text:style-name="P19">⸱⸱⸱⸱⸱⸱</text:p>
      <text:p text:style-name="P31">I liked my friend.</text:p>
      <text:p text:style-name="P2">mia na miwho soa mia te li lephe</text:p>
      <text:p text:style-name="P18"><text:span text:style-name="T12">⸱⸱</text:span><text:span text:style-name="T15"></text:span><text:span text:style-name="T2"></text:span><text:span text:style-name="T13">⸱</text:span><text:span text:style-name="T12">⸱⸱</text:span><text:span text:style-name="T13">⸱</text:span><text:span text:style-name="T12">⸱</text:span></text:p>
      <text:p text:style-name="Example">The food is ours.</text:p>
      <text:p text:style-name="P2">noshea na soa lo mia te phi</text:p>
      <text:p text:style-name="P17">⸱⸱⸱⸱⸱⸱<text:span text:style-name="T35"></text:span></text:p>
      <text:p text:style-name="Example">Our food is good.</text:p>
      <text:p text:style-name="P2">noshea soa lo mia na shishoa te phi</text:p>
      <text:p text:style-name="P15">⸱<text:span text:style-name="T25"></text:span>⸱⸱<text:span text:style-name="T3">⸱</text:span><text:span text:style-name="T3">⸱</text:span>⸱⸱</text:p>
      <text:p text:style-name="Example">Are you in good health?</text:p>
      <text:p text:style-name="Example">wha thi na ropho shishoa te la phe</text:p>
      <text:p text:style-name="Tengwar">⸱⸱⸱⸱⸱⸱<text:span text:style-name="T36"></text:span>⸱</text:p>
      <text:p text:style-name="Example">We love the orange trees.</text:p>
      <text:p text:style-name="Example">lo mia na lo lipha sathe te lothea</text:p>
      <text:p text:style-name="Tengwar">⸱⸱⸱⸱⸱⸱⸱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2in" style:contextual-spacing="false" fo:text-indent="0.3299in" style:auto-text-indent="false" style:page-number="auto"/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1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-0.0701in" style:auto-text-indent="false" style:page-number="auto">
        <style:tab-stops/>
      </style:paragraph-properties>
    </style:style>
    <style:style style:name="Tengwar" style:family="paragraph" style:parent-style-name="Standard">
      <style:paragraph-properties fo:margin-left="0in" fo:margin-right="0in" fo:line-height="100%" fo:text-indent="0in" style:auto-text-indent="false"/>
      <style:text-properties style:font-name="Tengwar Telcontar:=3" fo:font-family="'Tengwar Telcontar:=3'" style:font-style-name="Regular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99in" fo:margin-bottom="0.2in" style:contextual-spacing="false" style:page-number="auto"/>
      <style:text-properties style:font-name="Palatino Linotype" fo:font-family="'Palatino Linotype'" style:font-style-name="Regular" style:font-family-generic="roman" style:font-pitch="variable" fo:font-size="130%" fo:font-weight="normal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xample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First_20_Paragraph" style:display-name="First Paragraph" style:family="paragraph" style:parent-style-name="Standard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vertical-align="middle"/>
      <style:text-properties style:font-name="Palatino Linotype" fo:font-family="'Palatino Linotype'" style:font-style-name="Regular" style:font-family-generic="roman" style:font-pitch="variable" fo:font-weight="normal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margin-left="0in" fo:margin-right="0in" fo:margin-top="0.0799in" fo:margin-bottom="0.0799in" style:contextual-spacing="false" fo:text-indent="0in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officeooo:rsid="005fdfa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7</text:page-number><text:s/><text:span text:style-name="MT1">of </text:span><text:span text:style-name="MT1"><text:page-count>7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3T20:02:04.300000000</dc:date>
    <meta:editing-duration>PT3H6M48S</meta:editing-duration>
    <meta:editing-cycles>24</meta:editing-cycles>
    <meta:generator>LibreOffice/7.1.2.2$Windows_X86_64 LibreOffice_project/8a45595d069ef5570103caea1b71cc9d82b2aae4</meta:generator>
    <meta:print-date>2021-04-13T20:04:45.367000000</meta:print-date>
    <meta:document-statistic meta:table-count="2" meta:image-count="0" meta:object-count="0" meta:page-count="7" meta:paragraph-count="115" meta:word-count="878" meta:character-count="3715" meta:non-whitespace-character-count="3209"/>
  </office:meta>
</office:document-meta>
</file>