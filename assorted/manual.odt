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1" svg:font-family="'Tengwar Telcontar:=3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2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3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6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7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afad" officeooo:paragraph-rsid="002f6327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4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5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16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17" style:family="paragraph" style:parent-style-name="Standard">
      <style:text-properties officeooo:rsid="002cbf0c" officeooo:paragraph-rsid="002cbf0c"/>
    </style:style>
    <style:style style:name="P18" style:family="paragraph" style:parent-style-name="Standard">
      <style:text-properties fo:font-size="8pt" style:font-size-asian="7pt" style:font-size-complex="8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29" style:family="paragraph" style:parent-style-name="Standard">
      <style:paragraph-properties fo:break-before="page"/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30" style:family="paragraph" style:parent-style-name="Tengwar">
      <style:text-properties officeooo:rsid="002f6327" officeooo:paragraph-rsid="002f6327"/>
    </style:style>
    <style:style style:name="P31" style:family="paragraph" style:parent-style-name="Tengwar">
      <style:text-properties officeooo:paragraph-rsid="002f6327"/>
    </style:style>
    <style:style style:name="P32" style:family="paragraph" style:parent-style-name="Tengwar">
      <style:text-properties style:font-name="Palatino Linotype" fo:font-size="12pt" fo:letter-spacing="normal" fo:font-style="normal" officeooo:rsid="00232f95" officeooo:paragraph-rsid="002f6327" style:font-size-asian="10.5pt" style:font-style-asian="normal" style:font-size-complex="12pt" style:font-style-complex="normal"/>
    </style:style>
    <style:style style:name="P33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master-page-name="Standard">
      <style:paragraph-properties style:page-number="auto"/>
    </style:style>
    <style:style style:name="P36" style:family="paragraph" style:parent-style-name="Standard">
      <style:text-properties style:font-name="Palatino Linotype" fo:font-size="12pt" fo:font-style="normal" officeooo:rsid="002aebfd" officeooo:paragraph-rsid="002aebfd" style:font-size-asian="10.5pt" style:font-style-asian="normal" style:font-size-complex="12pt" style:font-style-complex="normal"/>
    </style:style>
    <style:style style:name="P37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38" style:family="paragraph" style:parent-style-name="Standard">
      <style:text-properties style:font-name="Palatino Linotype" fo:font-size="8pt" fo:letter-spacing="normal" fo:font-style="normal" officeooo:rsid="002069f4" officeooo:paragraph-rsid="002069f4" style:font-size-asian="8pt" style:font-style-asian="normal" style:font-size-complex="8pt" style:font-style-complex="normal"/>
    </style:style>
    <style:style style:name="P39" style:family="paragraph" style:parent-style-name="Standard">
      <style:text-properties style:font-name="Palatino Linotype" fo:font-size="8pt" fo:letter-spacing="normal" officeooo:rsid="001f77fd" officeooo:paragraph-rsid="001f77fd" style:font-size-asian="7pt" style:font-size-complex="8pt"/>
    </style:style>
    <style:style style:name="P40" style:family="paragraph" style:parent-style-name="Standard">
      <style:text-properties style:font-name="Palatino Linotype" fo:font-size="8pt" officeooo:rsid="002aebfd" officeooo:paragraph-rsid="002aebfd" style:font-size-asian="7pt" style:font-size-complex="8pt"/>
    </style:style>
    <style:style style:name="P41" style:family="paragraph" style:parent-style-name="Standard">
      <style:text-properties fo:font-style="italic" officeooo:rsid="002f6327" officeooo:paragraph-rsid="002f6327" style:font-style-asian="italic" style:font-style-complex="italic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3079ad" style:font-size-asian="10.5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2f95" style:font-style-asian="normal" style:font-style-complex="normal"/>
    </style:style>
    <style:style style:name="T11" style:family="text">
      <style:text-properties fo:font-style="normal" officeooo:rsid="002b0442" style:font-style-asian="normal" style:font-style-complex="normal"/>
    </style:style>
    <style:style style:name="T12" style:family="text">
      <style:text-properties fo:font-style="normal" officeooo:rsid="002f6327" style:font-style-asian="normal" style:font-style-complex="normal"/>
    </style:style>
    <style:style style:name="T13" style:family="text">
      <style:text-properties officeooo:rsid="0023afa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28e509"/>
    </style:style>
    <style:style style:name="T16" style:family="text">
      <style:text-properties officeooo:rsid="002f6327"/>
    </style:style>
    <style:style style:name="T17" style:family="text">
      <style:text-properties officeooo:rsid="0032b8f3"/>
    </style:style>
    <style:style style:name="T18" style:family="text">
      <style:text-properties officeooo:rsid="00340f5e"/>
    </style:style>
    <style:style style:name="T19" style:family="text">
      <style:text-properties style:font-name="Palatino Linotype1" officeooo:rsid="00340f5e"/>
    </style:style>
    <style:style style:name="T20" style:family="text">
      <style:text-properties style:font-name="Palatino Linotype"/>
    </style:style>
    <style:style style:name="T21" style:family="text">
      <style:text-properties style:font-name="Palatino Linotype" fo:font-size="18pt" style:font-size-asian="15.75pt" style:font-size-complex="18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8">φ</text:p>
      <text:p text:style-name="P22"/>
      <text:p text:style-name="P26">Phi</text:p>
      <text:p text:style-name="P24">A constructed language</text:p>
      <text:p text:style-name="P23"/>
      <text:p text:style-name="P27">Daniel Ellison</text:p>
      <text:p text:style-name="P25"/>
      <text:p text:style-name="P27"><text:date style:data-style-name="N76" text:date-value="2021-04-13T05:45:42.790000210">April 13, 2021</text:date></text:p>
      <text:h text:style-name="P35" text:outline-level="1">Introduction</text:h>
      <text:p text:style-name="P40"/>
      <text:p text:style-name="P37">Phi is a constructed language. Its name embodies the simplicity and softness of the language itself. <text:span text:style-name="T5">Phi</text:span><text:span text:style-name="T9"> (Φ) is also beauty in mathematics. It is</text:span></text:p>
      <text:p text:style-name="P36"/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9"> – </text:span><text:span text:style-name="T11">Wiktionary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h text:style-name="P34" text:outline-level="1">Examples</text:h>
      <text:p text:style-name="P39"/>
      <text:p text:style-name="P19"><text:span text:style-name="T7">Following are several examples of Phi phrases. They are given </text:span><text:span text:style-name="T8">first </text:span><text:span text:style-name="T7">in English, then in romanized text, and finally in the Tengwar script of J.R.R. Tolkien.</text:span></text:p>
      <text:p text:style-name="P21"/>
      <text:p text:style-name="Standard">My name <text:span text:style-name="T16">is Daniel</text:span></text:p>
      <text:p text:style-name="P41"><text:span text:style-name="T19">phiathe</text:span><text:span text:style-name="T17"> soa mia na </text:span>thanie te phi</text:p>
      <text:p text:style-name="P30"><text:span text:style-name="T3"></text:span><text:span text:style-name="T17">⸱⸱⸱</text:span>⸱⸱</text:p>
      <text:p text:style-name="P18"/>
      <text:p text:style-name="P20">I love you.</text:p>
      <text:p text:style-name="P3">mia na thi te lothea</text:p>
      <text:p text:style-name="Tengwar">⸱⸱<text:span text:style-name="T4">⸱⸱</text:span></text:p>
      <text:p text:style-name="P2"><text:span text:style-name="T14"><text:line-break/></text:span>The sky is blue.</text:p>
      <text:p text:style-name="P5">whetho na mipho te phi</text:p>
      <text:p text:style-name="Tengwar"><text:span text:style-name="T16"></text:span>⸱⸱⸱⸱</text:p>
      <text:p text:style-name="P13"/>
      <text:p text:style-name="P1">They like food.</text:p>
      <text:p text:style-name="P4">lo sha na noshea te lephe</text:p>
      <text:p text:style-name="Tengwar">⸱⸱⸱⸱⸱</text:p>
      <text:p text:style-name="P38"/>
      <text:p text:style-name="P10">I like it.</text:p>
      <text:p text:style-name="P4">mia na sha te lephe</text:p>
      <text:p text:style-name="Tengwar">⸱⸱⸱⸱</text:p>
      <text:p text:style-name="P14"/>
      <text:p text:style-name="P11">I do no like green!</text:p>
      <text:p text:style-name="P6">ho mia na hashe te me lephe</text:p>
      <text:p text:style-name="Tengwar">⸱⸱⸱⸱⸱⸱</text:p>
      <text:p text:style-name="P14"/>
      <text:p text:style-name="Standard">I liked my friend.</text:p>
      <text:p text:style-name="P6">mia na miwho soa mia te li lephe</text:p>
      <text:p text:style-name="Tengwar"><text:span text:style-name="T9">⸱⸱</text:span><text:span text:style-name="T12"></text:span><text:span text:style-name="T1"></text:span><text:span text:style-name="T10">⸱</text:span><text:span text:style-name="T9">⸱⸱</text:span><text:span text:style-name="T10">⸱</text:span><text:span text:style-name="T9">⸱</text:span></text:p>
      <text:p text:style-name="P29">The food is ours.</text:p>
      <text:p text:style-name="P7">noshea na soa lo mia te phi</text:p>
      <text:p text:style-name="P31">⸱⸱⸱⸱⸱⸱<text:span text:style-name="T15"></text:span></text:p>
      <text:p text:style-name="P18"/>
      <text:p text:style-name="P32">Our food is good.</text:p>
      <text:p text:style-name="P7">noshea soa lo mia na shishoa te phi</text:p>
      <text:p text:style-name="Tengwar">⸱<text:span text:style-name="T13"></text:span>⸱⸱<text:span text:style-name="T2">⸱</text:span><text:span text:style-name="T2">⸱</text:span>⸱⸱</text:p>
      <text:p text:style-name="P15"/>
      <text:p text:style-name="P12">Are you in good health?</text:p>
      <text:p text:style-name="P9">wha thi na ropho shishoa te la phe</text:p>
      <text:p text:style-name="Tengwar">⸱⸱⸱⸱⸱⸱<text:span text:style-name="T16"></text:span>⸱</text:p>
      <text:p text:style-name="P16"/>
      <text:p text:style-name="P12">We love the orange trees.</text:p>
      <text:p text:style-name="P8">lo mia na lo lipha sathe te lothea</text:p>
      <text:p text:style-name="Tengwar">⸱⸱⸱⸱⸱⸱⸱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1" svg:font-family="'Tengwar Telcontar:=3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0799in" style:contextual-spacing="false" style:page-number="auto"/>
      <style:text-properties style:font-name="Palatino Linotype1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05:45:42.735000000</dc:date>
    <meta:editing-duration>PT1H29M23S</meta:editing-duration>
    <meta:editing-cycles>10</meta:editing-cycles>
    <meta:generator>LibreOffice/7.1.2.2$Windows_X86_64 LibreOffice_project/8a45595d069ef5570103caea1b71cc9d82b2aae4</meta:generator>
    <meta:print-date>2021-04-12T19:44:42.300000000</meta:print-date>
    <meta:document-statistic meta:table-count="0" meta:image-count="0" meta:object-count="0" meta:page-count="4" meta:paragraph-count="44" meta:word-count="541" meta:character-count="1652" meta:non-whitespace-character-count="1414"/>
  </office:meta>
</office:document-meta>
</file>