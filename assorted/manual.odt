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4" style:family="paragraph" style:parent-style-name="Example">
      <style:paragraph-properties fo:break-before="page"/>
      <style:text-properties officeooo:paragraph-rsid="004f26e4"/>
    </style:style>
    <style:style style:name="P25" style:family="paragraph" style:parent-style-name="Table">
      <style:paragraph-properties fo:break-before="page" fo:keep-with-next="always"/>
    </style:style>
    <style:style style:name="P26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27" style:family="paragraph" style:parent-style-name="Example">
      <style:text-properties officeooo:paragraph-rsid="0077dcd7"/>
    </style:style>
    <style:style style:name="P28" style:family="paragraph" style:parent-style-name="Example">
      <style:text-properties fo:font-style="italic" officeooo:paragraph-rsid="0077dcd7" style:font-style-asian="italic" style:font-style-complex="italic"/>
    </style:style>
    <style:style style:name="P29" style:family="paragraph" style:parent-style-name="Heading_20_1" style:list-style-name="">
      <style:text-properties officeooo:paragraph-rsid="005fdfa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Heading_20_1">
      <style:paragraph-properties fo:break-before="page"/>
      <style:text-properties officeooo:rsid="003b443c" officeooo:paragraph-rsid="003b443c"/>
    </style:style>
    <style:style style:name="P32" style:family="paragraph" style:parent-style-name="Heading_20_1">
      <style:paragraph-properties fo:break-before="page"/>
      <style:text-properties officeooo:paragraph-rsid="005fdfae"/>
    </style:style>
    <style:style style:name="P33" style:family="paragraph" style:parent-style-name="Standard">
      <style:text-properties officeooo:rsid="00711222" officeooo:paragraph-rsid="00740221"/>
    </style:style>
    <style:style style:name="P34" style:family="paragraph" style:parent-style-name="Standard">
      <style:text-properties officeooo:rsid="0075fc9d" officeooo:paragraph-rsid="008dbd64"/>
    </style:style>
    <style:style style:name="P35" style:family="paragraph" style:parent-style-name="Standard">
      <style:text-properties style:font-name="Palatino Linotype" officeooo:rsid="0075fc9d" officeooo:paragraph-rsid="00762e79"/>
    </style:style>
    <style:style style:name="P36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37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38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ngwar">
      <style:text-properties fo:font-size="36pt" style:font-size-asian="36pt" style:font-size-complex="36pt"/>
    </style:style>
    <style:style style:name="P48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49" style:family="paragraph" style:parent-style-name="Tengwar">
      <style:text-properties officeooo:paragraph-rsid="0077dcd7"/>
    </style:style>
    <style:style style:name="P50" style:family="paragraph" style:parent-style-name="Tengwar">
      <style:text-properties officeooo:paragraph-rsid="007a0c23"/>
    </style:style>
    <style:style style:name="P51" style:family="paragraph" style:parent-style-name="Tengwar">
      <style:text-properties officeooo:rsid="002f6327" officeooo:paragraph-rsid="007a0c23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officeooo:rsid="0023afad"/>
    </style:style>
    <style:style style:name="T43" style:family="text">
      <style:text-properties style:font-name="Palatino Linotype1" fo:font-size="12pt" fo:letter-spacing="normal" officeooo:rsid="001f77fd" style:font-size-asian="10.5pt" style:font-size-complex="12pt"/>
    </style:style>
    <style:style style:name="T44" style:family="text">
      <style:text-properties style:font-name="Palatino Linotype1" fo:font-size="12pt" fo:letter-spacing="normal" officeooo:rsid="003079ad" style:font-size-asian="10.5pt" style:font-size-complex="12pt"/>
    </style:style>
    <style:style style:name="T45" style:family="text">
      <style:text-properties style:font-name="Palatino Linotype1" fo:font-size="12pt" fo:letter-spacing="normal" officeooo:rsid="0077dcd7" style:font-size-asian="10.5pt" style:font-size-complex="12pt"/>
    </style:style>
    <style:style style:name="T46" style:family="text">
      <style:text-properties style:font-name="Palatino Linotype1" fo:font-size="12pt" fo:letter-spacing="normal" officeooo:rsid="00846372" style:font-size-asian="10.5pt" style:font-size-complex="12pt"/>
    </style:style>
    <style:style style:name="T47" style:family="text">
      <style:text-properties style:font-name="Palatino Linotype1" fo:font-size="12pt" officeooo:rsid="002aebfd" style:font-size-asian="10.5pt" style:font-size-complex="12pt"/>
    </style:style>
    <style:style style:name="T48" style:family="text">
      <style:text-properties style:font-name="Palatino Linotype1" fo:font-size="12pt" officeooo:rsid="0054cfe5" style:font-size-asian="10.5pt" style:font-size-complex="12pt"/>
    </style:style>
    <style:style style:name="T49" style:family="text">
      <style:text-properties style:font-name="Palatino Linotype1" fo:font-size="12pt" officeooo:rsid="005a0109" style:font-size-asian="10.5pt" style:font-size-complex="12pt"/>
    </style:style>
    <style:style style:name="T50" style:family="text">
      <style:text-properties style:font-name="Palatino Linotype1" fo:font-size="12pt" officeooo:rsid="005bff1b" style:font-size-asian="10.5pt" style:font-size-complex="12pt"/>
    </style:style>
    <style:style style:name="T51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2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4" style:family="text">
      <style:text-properties officeooo:rsid="0028e509"/>
    </style:style>
    <style:style style:name="T55" style:family="text">
      <style:text-properties officeooo:rsid="002f6327"/>
    </style:style>
    <style:style style:name="T56" style:family="text">
      <style:text-properties officeooo:rsid="0032b8f3"/>
    </style:style>
    <style:style style:name="T57" style:family="text">
      <style:text-properties style:font-name="Palatino Linotype"/>
    </style:style>
    <style:style style:name="T58" style:family="text">
      <style:text-properties style:font-name="Palatino Linotype" fo:font-style="italic" officeooo:rsid="00340f5e" style:font-style-asian="italic" style:font-style-complex="italic"/>
    </style:style>
    <style:style style:name="T59" style:family="text">
      <style:text-properties style:font-name="Palatino Linotype" fo:font-style="italic" officeooo:rsid="0075fc9d" style:font-style-asian="italic" style:font-style-complex="italic"/>
    </style:style>
    <style:style style:name="T60" style:family="text">
      <style:text-properties style:font-name="Palatino Linotype" officeooo:rsid="003ee6d6"/>
    </style:style>
    <style:style style:name="T61" style:family="text">
      <style:text-properties style:font-name="Palatino Linotype" officeooo:rsid="004ca095"/>
    </style:style>
    <style:style style:name="T62" style:family="text">
      <style:text-properties style:font-name="Palatino Linotype" fo:font-size="10pt" officeooo:rsid="0051e91f" style:font-size-asian="10pt" style:font-size-complex="10pt"/>
    </style:style>
    <style:style style:name="T63" style:family="text">
      <style:text-properties style:font-name="Palatino Linotype" fo:font-size="10pt" officeooo:rsid="00631a01" style:font-size-asian="10pt" style:font-size-complex="10pt"/>
    </style:style>
    <style:style style:name="T64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5" style:family="text">
      <style:text-properties style:font-name="Palatino Linotype" officeooo:rsid="005bff1b"/>
    </style:style>
    <style:style style:name="T66" style:family="text">
      <style:text-properties style:font-name="Palatino Linotype" officeooo:rsid="005dfc65"/>
    </style:style>
    <style:style style:name="T67" style:family="text">
      <style:text-properties style:font-name="Palatino Linotype" fo:font-style="normal" style:font-style-asian="normal" style:font-style-complex="normal"/>
    </style:style>
    <style:style style:name="T68" style:family="text">
      <style:text-properties style:font-name="Palatino Linotype" officeooo:rsid="00740221"/>
    </style:style>
    <style:style style:name="T69" style:family="text">
      <style:text-properties style:font-name="Palatino Linotype" officeooo:rsid="0075fc9d"/>
    </style:style>
    <style:style style:name="T70" style:family="text">
      <style:text-properties style:font-name="Palatino Linotype" officeooo:rsid="00762e79"/>
    </style:style>
    <style:style style:name="T71" style:family="text">
      <style:text-properties style:font-name="Palatino Linotype" officeooo:rsid="007a0c23"/>
    </style:style>
    <style:style style:name="T72" style:family="text">
      <style:text-properties style:font-name="Palatino Linotype" officeooo:rsid="008668ad"/>
    </style:style>
    <style:style style:name="T73" style:family="text">
      <style:text-properties style:font-name="Palatino Linotype" officeooo:rsid="00876d12"/>
    </style:style>
    <style:style style:name="T74" style:family="text">
      <style:text-properties style:font-name="Palatino Linotype" officeooo:rsid="00885bcb"/>
    </style:style>
    <style:style style:name="T75" style:family="text">
      <style:text-properties style:font-name="Palatino Linotype" officeooo:rsid="008a59b7"/>
    </style:style>
    <style:style style:name="T76" style:family="text">
      <style:text-properties style:font-name="Palatino Linotype" officeooo:rsid="008c5f65"/>
    </style:style>
    <style:style style:name="T77" style:family="text">
      <style:text-properties officeooo:rsid="003eb40c"/>
    </style:style>
    <style:style style:name="T78" style:family="text">
      <style:text-properties officeooo:rsid="003ee6d6"/>
    </style:style>
    <style:style style:name="T79" style:family="text">
      <style:text-properties fo:font-variant="small-caps" style:font-name="Palatino Linotype1" fo:font-size="12pt" officeooo:rsid="002aebfd" style:font-size-asian="10.5pt" style:font-size-complex="12pt"/>
    </style:style>
    <style:style style:name="T80" style:family="text">
      <style:text-properties officeooo:rsid="0041eff8"/>
    </style:style>
    <style:style style:name="T81" style:family="text">
      <style:text-properties officeooo:rsid="00434435"/>
    </style:style>
    <style:style style:name="T82" style:family="text">
      <style:text-properties officeooo:rsid="004a8779"/>
    </style:style>
    <style:style style:name="T83" style:family="text">
      <style:text-properties officeooo:rsid="004ca095"/>
    </style:style>
    <style:style style:name="T84" style:family="text">
      <style:text-properties officeooo:rsid="004e5177"/>
    </style:style>
    <style:style style:name="T85" style:family="text">
      <style:text-properties officeooo:rsid="0050274c"/>
    </style:style>
    <style:style style:name="T86" style:family="text">
      <style:text-properties officeooo:rsid="0051e91f"/>
    </style:style>
    <style:style style:name="T87" style:family="text">
      <style:text-properties officeooo:rsid="00631a01"/>
    </style:style>
    <style:style style:name="T88" style:family="text">
      <style:text-properties officeooo:rsid="0067ded3"/>
    </style:style>
    <style:style style:name="T89" style:family="text">
      <style:text-properties officeooo:rsid="0072236d"/>
    </style:style>
    <style:style style:name="T90" style:family="text">
      <style:text-properties officeooo:rsid="0075fc9d"/>
    </style:style>
    <style:style style:name="T91" style:family="text">
      <style:text-properties officeooo:rsid="00762e79"/>
    </style:style>
    <style:style style:name="T92" style:family="text">
      <style:text-properties officeooo:rsid="007716af"/>
    </style:style>
    <style:style style:name="T93" style:family="text">
      <style:text-properties officeooo:rsid="0077dcd7"/>
    </style:style>
    <style:style style:name="T94" style:family="text">
      <style:text-properties officeooo:rsid="0079473b"/>
    </style:style>
    <style:style style:name="T95" style:family="text">
      <style:text-properties style:font-name="Tengwar Telcontar:=31" fo:font-size="22pt" fo:letter-spacing="normal" officeooo:rsid="0079473b" style:font-size-asian="22pt" style:font-size-complex="22pt"/>
    </style:style>
    <style:style style:name="T96" style:family="text">
      <style:text-properties style:font-name="Tengwar Telcontar:=31" fo:font-size="22pt" fo:letter-spacing="normal" fo:font-style="normal" officeooo:rsid="0079473b" style:font-size-asian="22pt" style:font-style-asian="normal" style:font-size-complex="22pt" style:font-style-complex="normal"/>
    </style:style>
    <style:style style:name="T97" style:family="text">
      <style:text-properties style:font-name="Tengwar Telcontar:=31" fo:letter-spacing="normal" officeooo:rsid="007a0c23"/>
    </style:style>
    <style:style style:name="T98" style:family="text">
      <style:text-properties officeooo:rsid="007a6ac4"/>
    </style:style>
    <style:style style:name="T99" style:family="text">
      <style:text-properties officeooo:rsid="007d8821"/>
    </style:style>
    <style:style style:name="T100" style:family="text">
      <style:text-properties officeooo:rsid="007fb96c"/>
    </style:style>
    <style:style style:name="T101" style:family="text">
      <style:text-properties officeooo:rsid="00828690"/>
    </style:style>
    <style:style style:name="T102" style:family="text">
      <style:text-properties officeooo:rsid="00875571"/>
    </style:style>
    <style:style style:name="T103" style:family="text">
      <style:text-properties officeooo:rsid="00876d12"/>
    </style:style>
    <style:style style:name="T104" style:family="text">
      <style:text-properties officeooo:rsid="00885bcb"/>
    </style:style>
    <style:style style:name="T105" style:family="text">
      <style:text-properties officeooo:rsid="008a59b7"/>
    </style:style>
    <style:style style:name="T106" style:family="text">
      <style:text-properties officeooo:rsid="008c5f65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4T10:50:12.313999934">April 14, 2021</text:date></text:p>
      <text:h text:style-name="P30" text:outline-level="1">Introduction</text:h>
      <text:p text:style-name="First_20_Paragraph"><text:span text:style-name="T79">Phi</text:span><text:span text:style-name="T47"> is a constructed language. </text:span><text:span text:style-name="T49">A constructed language is one whose phonology, grammar, and vocabulary, instead of having developed naturally, are consciously devised</text:span><text:span text:style-name="T49"><text:note text:id="ftn1" text:note-class="footnote"><text:note-citation>1</text:note-citation><text:note-body><text:p text:style-name="Footnote">https://en.wikipedia.org/wiki/Constructed_language</text:p></text:note-body></text:note></text:span><text:span text:style-name="T49">. </text:span><text:span text:style-name="T48">The sound of </text:span><text:span text:style-name="T50">the </text:span><text:span text:style-name="T47">name </text:span><text:span text:style-name="T52">Phi</text:span><text:span text:style-name="T47"> embodies the simplicity and softness of the language itself. </text:span><text:span text:style-name="T51">Phi</text:span><text:span text:style-name="T53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5">is </text:span><text:span text:style-name="T66">sometimes</text:span> reminded of the sounds of the natural world. There is also a musicality and rhythm to sentences in the language.</text:p>
      <text:h text:style-name="P31" text:outline-level="1">The Tengwar</text:h>
      <text:p text:style-name="First_20_Paragraph">Phi can be written in <text:span text:style-name="T61">either</text:span> of two ways: using the standard Latin alphabet or the Tengwar script. <text:span text:style-name="T83">Tengwar was</text:span> invented by J. R. R. Tolkien and <text:span text:style-name="T77">first described in </text:span>Appendix E of <text:span text:style-name="T77">the third book in his trilogy, </text:span><text:span text:style-name="T9">The Lord of the Rings</text:span>. <text:span text:style-name="T77">There are numerous sources of information </text:span><text:span text:style-name="T78">available </text:span><text:span text:style-name="T60">concerning </text:span><text:span text:style-name="T77">the Tengwar so details </text:span><text:span text:style-name="T98">and history </text:span><text:span text:style-name="T77">of the script will not be explored here.</text:span></text:p>
      <text:p text:style-name="P12">The look and feel of the Tengwar characters (<text:span text:style-name="T9">tengwa</text:span>) and its diacritical marks (<text:span text:style-name="T9">tehta</text:span>) <text:span text:style-name="T80">match the idea</text:span><text:span text:style-name="T83">l</text:span><text:span text:style-name="T80">s and philosoph</text:span><text:span text:style-name="T83">ies</text:span><text:span text:style-name="T80"> behind this language. Phi has a small set of consonants and vowels so it is relatively straightforward to map its </text:span><text:span text:style-name="T26">graphemes</text:span><text:span text:style-name="T80"> to Tengwar characters.</text:span><text:span text:style-name="T81"> The </text:span><text:span text:style-name="T84">Unicode </text:span><text:span text:style-name="T81">font </text:span><text:span text:style-name="T13">Tengwar Telcontar</text:span><text:span text:style-name="T22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4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36"><text:span text:style-name="T25">Table</text:span><text:span text:style-name="T39">s</text:span><text:span text:style-name="T25"> </text:span><text:span text:style-name="T29">1 </text:span><text:span text:style-name="T39">and 2 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5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37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38"><text:span text:style-name="T33">T</text:span><text:span text:style-name="T18">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47"><text:tab/><text:tab/></text:p>
      <text:p text:style-name="P33">A <text:span text:style-name="T68">six</text:span>-letter word in latin characters requires only two <text:span text:style-name="T9">tengwa</text:span> to represent <text:span text:style-name="T70">it</text:span>. Many words in Phi are two to three characters long. This occurs mainly with parts of speech such as particles, prepositions, or pronouns. These words are <text:span text:style-name="T68">almost </text:span><text:span text:style-name="T72">always</text:span> a single <text:span text:style-name="T59">tengwa</text:span> <text:span text:style-name="T89">with diacriticals </text:span>in Phi Tengwar. <text:span text:style-name="T90">All of this results in a very compact but clear Phi </text:span><text:span text:style-name="T69">writing system.</text:span></text:p>
      <text:p text:style-name="P35"><text:span text:style-name="T91">This is the phrase</text:span> “<text:span text:style-name="T18">I love you”</text:span> <text:span text:style-name="T91">i</text:span>n its simplest vernacular form <text:span text:style-name="T91">in Phi</text:span>:</text:p>
      <text:p text:style-name="P47"><text:tab/><text:tab/></text:p>
      <text:p text:style-name="P34"><text:span text:style-name="T76">That is a</text:span> beautiful sentiment rendered <text:span text:style-name="T73">in</text:span> a beautiful script. <text:span text:style-name="T92">In more formal communication, particles are used to mark parts of speech </text:span><text:span text:style-name="T94">in order </text:span><text:span text:style-name="T92">to reduce ambiguity. As well, word markers are often used to distingu</text:span><text:span text:style-name="T102">ish</text:span><text:span text:style-name="T92"> multisyllabic words for clarity. </text:span><text:span text:style-name="T74">Phi Tengwar</text:span><text:span text:style-name="T100"> punctuation is outlined in Table 3. </text:span><text:span text:style-name="T75">As an</text:span><text:span text:style-name="T92"> example, </text:span><text:span text:style-name="T70">the phrase</text:span><text:span text:style-name="T57"> “</text:span><text:span text:style-name="T67">I love you”</text:span><text:span text:style-name="T92"> </text:span><text:span text:style-name="T71">would be</text:span><text:span text:style-name="T92"> written formally </text:span><text:span text:style-name="T71">as</text:span><text:span text:style-name="T92">:</text:span></text:p>
      <text:p text:style-name="P48"><text:tab/><text:tab/><text:span text:style-name="T97"></text:span>⸱⸱⸱<text:span text:style-name="T8">⸱⸱</text:span></text:p>
      <text:p text:style-name="P25">Table <text:sequence text:ref-name="refTable0" text:name="Table" text:formula="ooow:Table+1" style:num-format="1">1</text:sequence>: Phi <text:span text:style-name="T99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13">Grapheme</text:p>
          </table:table-cell>
          <table:table-cell table:style-name="Table1.B1" office:value-type="string">
            <text:p text:style-name="P14">Tengwa</text:p>
          </table:table-cell>
          <table:table-cell table:style-name="Table1.A1" office:value-type="string">
            <text:p text:style-name="P15">Keypress</text:p>
          </table:table-cell>
        </table:table-row>
        <table:table-row table:style-name="Table1.2">
          <table:table-cell table:style-name="Table1.A2" office:value-type="string">
            <text:p text:style-name="P16">p</text:p>
          </table:table-cell>
          <table:table-cell table:style-name="Table1.B2" office:value-type="string">
            <text:p text:style-name="P22"></text:p>
          </table:table-cell>
          <table:table-cell table:style-name="Table1.A2" office:value-type="string">
            <text:p text:style-name="P17">p</text:p>
          </table:table-cell>
        </table:table-row>
        <table:table-row table:style-name="Table1.3">
          <table:table-cell table:style-name="Table1.A3" office:value-type="string">
            <text:p text:style-name="P16">t</text:p>
          </table:table-cell>
          <table:table-cell table:style-name="Table1.B3" office:value-type="string">
            <text:p text:style-name="P22"></text:p>
          </table:table-cell>
          <table:table-cell table:style-name="Table1.A3" office:value-type="string">
            <text:p text:style-name="P17">t</text:p>
          </table:table-cell>
        </table:table-row>
        <table:table-row table:style-name="Table1.4">
          <table:table-cell table:style-name="Table1.A2" office:value-type="string">
            <text:p text:style-name="P16">m</text:p>
          </table:table-cell>
          <table:table-cell table:style-name="Table1.B2" office:value-type="string">
            <text:p text:style-name="P22"></text:p>
          </table:table-cell>
          <table:table-cell table:style-name="Table1.A2" office:value-type="string">
            <text:p text:style-name="P17">m</text:p>
          </table:table-cell>
        </table:table-row>
        <table:table-row table:style-name="Table1.5">
          <table:table-cell table:style-name="Table1.A3" office:value-type="string">
            <text:p text:style-name="P16">n</text:p>
          </table:table-cell>
          <table:table-cell table:style-name="Table1.B3" office:value-type="string">
            <text:p text:style-name="P22"></text:p>
          </table:table-cell>
          <table:table-cell table:style-name="Table1.A3" office:value-type="string">
            <text:p text:style-name="P17">n</text:p>
          </table:table-cell>
        </table:table-row>
        <table:table-row table:style-name="Table1.6">
          <table:table-cell table:style-name="Table1.A2" office:value-type="string">
            <text:p text:style-name="P16">r</text:p>
          </table:table-cell>
          <table:table-cell table:style-name="Table1.B2" office:value-type="string">
            <text:p text:style-name="P22"></text:p>
          </table:table-cell>
          <table:table-cell table:style-name="Table1.A2" office:value-type="string">
            <text:p text:style-name="P18">shift-r</text:p>
          </table:table-cell>
        </table:table-row>
        <table:table-row table:style-name="Table1.7">
          <table:table-cell table:style-name="Table1.A3" office:value-type="string">
            <text:p text:style-name="P16">s</text:p>
          </table:table-cell>
          <table:table-cell table:style-name="Table1.B3" office:value-type="string">
            <text:p text:style-name="P23"></text:p>
          </table:table-cell>
          <table:table-cell table:style-name="Table1.A3" office:value-type="string">
            <text:p text:style-name="P17">s</text:p>
          </table:table-cell>
        </table:table-row>
        <table:table-row table:style-name="Table1.8">
          <table:table-cell table:style-name="Table1.A2" office:value-type="string">
            <text:p text:style-name="P16">s</text:p>
          </table:table-cell>
          <table:table-cell table:style-name="Table1.B2" office:value-type="string">
            <text:p text:style-name="P22"></text:p>
          </table:table-cell>
          <table:table-cell table:style-name="Table1.A2" office:value-type="string">
            <text:p text:style-name="P17">shift-s</text:p>
          </table:table-cell>
        </table:table-row>
        <table:table-row table:style-name="Table1.9">
          <table:table-cell table:style-name="Table1.A3" office:value-type="string">
            <text:p text:style-name="P16">h</text:p>
          </table:table-cell>
          <table:table-cell table:style-name="Table1.B3" office:value-type="string">
            <text:p text:style-name="P22"></text:p>
          </table:table-cell>
          <table:table-cell table:style-name="Table1.A3" office:value-type="string">
            <text:p text:style-name="P17">h</text:p>
          </table:table-cell>
        </table:table-row>
        <table:table-row table:style-name="Table1.10">
          <table:table-cell table:style-name="Table1.A2" office:value-type="string">
            <text:p text:style-name="P16">l</text:p>
          </table:table-cell>
          <table:table-cell table:style-name="Table1.B2" office:value-type="string">
            <text:p text:style-name="P22"></text:p>
          </table:table-cell>
          <table:table-cell table:style-name="Table1.A2" office:value-type="string">
            <text:p text:style-name="P17">l</text:p>
          </table:table-cell>
        </table:table-row>
        <table:table-row table:style-name="Table1.11">
          <table:table-cell table:style-name="Table1.A3" office:value-type="string">
            <text:p text:style-name="P16">w</text:p>
          </table:table-cell>
          <table:table-cell table:style-name="Table1.B3" office:value-type="string">
            <text:p text:style-name="P22"></text:p>
          </table:table-cell>
          <table:table-cell table:style-name="Table1.A3" office:value-type="string">
            <text:p text:style-name="P21">w</text:p>
          </table:table-cell>
        </table:table-row>
        <table:table-row table:style-name="Table1.12">
          <table:table-cell table:style-name="Table1.A2" office:value-type="string">
            <text:p text:style-name="P16">ph</text:p>
          </table:table-cell>
          <table:table-cell table:style-name="Table1.B2" office:value-type="string">
            <text:p text:style-name="P22"></text:p>
          </table:table-cell>
          <table:table-cell table:style-name="Table1.A2" office:value-type="string">
            <text:p text:style-name="P17">shift-p</text:p>
          </table:table-cell>
        </table:table-row>
        <table:table-row table:style-name="Table1.13">
          <table:table-cell table:style-name="Table1.A3" office:value-type="string">
            <text:p text:style-name="P16">th</text:p>
          </table:table-cell>
          <table:table-cell table:style-name="Table1.B3" office:value-type="string">
            <text:p text:style-name="P22"></text:p>
          </table:table-cell>
          <table:table-cell table:style-name="Table1.A3" office:value-type="string">
            <text:p text:style-name="P17">shift-t</text:p>
          </table:table-cell>
        </table:table-row>
        <table:table-row table:style-name="Table1.14">
          <table:table-cell table:style-name="Table1.A2" office:value-type="string">
            <text:p text:style-name="P16">sh</text:p>
          </table:table-cell>
          <table:table-cell table:style-name="Table1.B14" office:value-type="string">
            <text:p text:style-name="P22"></text:p>
          </table:table-cell>
          <table:table-cell table:style-name="Table1.A2" office:value-type="string">
            <text:p text:style-name="P17">shift-c</text:p>
          </table:table-cell>
        </table:table-row>
        <table:table-row table:style-name="Table1.15">
          <table:table-cell table:style-name="Table1.A3" office:value-type="string">
            <text:p text:style-name="P16">wh</text:p>
          </table:table-cell>
          <table:table-cell table:style-name="Table1.B3" office:value-type="string">
            <text:p text:style-name="P22"></text:p>
          </table:table-cell>
          <table:table-cell table:style-name="Table1.A3" office:value-type="string">
            <text:p text:style-name="P17">shift-k</text:p>
          </table:table-cell>
        </table:table-row>
      </table:table>
      <text:p text:style-name="P39"><text:soft-page-break/>Table <text:sequence text:ref-name="refTable1" text:name="Table" text:formula="ooow:Table+1" style:num-format="1">2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591777530496">
            <table:table-cell table:style-name="Table2.A1" office:value-type="string">
              <text:p text:style-name="P13">Grapheme</text:p>
            </table:table-cell>
            <table:table-cell table:style-name="Table2.B1" office:value-type="string">
              <text:p text:style-name="P14">Te<text:span text:style-name="T87">hta</text:span></text:p>
            </table:table-cell>
            <table:table-cell table:style-name="Table2.A1" office:value-type="string">
              <text:p text:style-name="P1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6">i</text:p>
          </table:table-cell>
          <table:table-cell table:style-name="Table2.B2" office:value-type="string">
            <text:p text:style-name="P22"> <text:s/><text:span text:style-name="T82"></text:span></text:p>
          </table:table-cell>
          <table:table-cell table:style-name="Table2.A2" office:value-type="string">
            <text:p text:style-name="P21">i / <text:span text:style-name="T86">option</text:span><text:span text:style-name="T82">-i</text:span><text:span text:style-name="T82"><text:note text:id="ftn6" text:note-class="footnote"><text:note-citation>6</text:note-citation><text:note-body><text:p text:style-name="P3">Keypresses <text:span text:style-name="T85">for the </text:span><text:span text:style-name="T88">low </text:span><text:span text:style-name="T85">diacriticals </text:span>are given for <text:span text:style-name="T62">macOS</text:span>. <text:span text:style-name="T63">U</text:span><text:span text:style-name="T62">se </text:span><text:span text:style-name="T64">ctrl-alt</text:span><text:span text:style-name="T62"> </text:span><text:span text:style-name="T63">on Windows </text:span><text:span text:style-name="T62">instead of </text:span><text:span text:style-name="T64">option</text:span><text:span text:style-name="T62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16">e</text:p>
          </table:table-cell>
          <table:table-cell table:style-name="Table2.B3" office:value-type="string">
            <text:p text:style-name="P22"> <text:s/><text:span text:style-name="T82"></text:span></text:p>
          </table:table-cell>
          <table:table-cell table:style-name="Table2.A3" office:value-type="string">
            <text:p text:style-name="P20">e / <text:span text:style-name="T86">option</text:span><text:span text:style-name="T82">-e</text:span></text:p>
          </table:table-cell>
        </table:table-row>
        <table:table-row table:style-name="Table2.4">
          <table:table-cell table:style-name="Table2.A2" office:value-type="string">
            <text:p text:style-name="P16">o</text:p>
          </table:table-cell>
          <table:table-cell table:style-name="Table2.B4" office:value-type="string">
            <text:p text:style-name="P22"> <text:s/><text:span text:style-name="T82"></text:span></text:p>
          </table:table-cell>
          <table:table-cell table:style-name="Table2.A2" office:value-type="string">
            <text:p text:style-name="P20">o / <text:span text:style-name="T86">option</text:span><text:span text:style-name="T82">-o</text:span></text:p>
          </table:table-cell>
        </table:table-row>
        <table:table-row table:style-name="Table2.2">
          <table:table-cell table:style-name="Table2.A3" office:value-type="string">
            <text:p text:style-name="P16">a</text:p>
          </table:table-cell>
          <table:table-cell table:style-name="Table2.B3" office:value-type="string">
            <text:p text:style-name="P22"> <text:s/><text:span text:style-name="T82"></text:span></text:p>
          </table:table-cell>
          <table:table-cell table:style-name="Table2.A3" office:value-type="string">
            <text:p text:style-name="P19">a / <text:span text:style-name="T86">option</text:span><text:span text:style-name="T82">-a</text:span></text:p>
          </table:table-cell>
        </table:table-row>
      </table:table>
      <text:p text:style-name="Text_20_body"/>
      <text:p text:style-name="P39">Table <text:sequence text:ref-name="refTable2" text:name="Table" text:formula="ooow:Table+1" style:num-format="1">3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591691389984">
            <table:table-cell table:style-name="Table3.A1" office:value-type="string">
              <text:p text:style-name="P46">Punctuation</text:p>
            </table:table-cell>
            <table:table-cell table:style-name="Table3.B1" office:value-type="string">
              <text:p text:style-name="P46">Tengwar</text:p>
            </table:table-cell>
            <table:table-cell table:style-name="Table3.A1" office:value-type="string">
              <text:p text:style-name="P1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2">space</text:p>
          </table:table-cell>
          <table:table-cell table:style-name="Table3.B2" office:value-type="string">
            <text:p text:style-name="P44">⸱</text:p>
          </table:table-cell>
          <table:table-cell table:style-name="Table3.A2" office:value-type="string">
            <text:p text:style-name="P19">,</text:p>
          </table:table-cell>
        </table:table-row>
        <table:table-row table:style-name="Table3.2">
          <table:table-cell table:style-name="Table3.A3" office:value-type="string">
            <text:p text:style-name="P42">period</text:p>
          </table:table-cell>
          <table:table-cell table:style-name="Table3.B3" office:value-type="string">
            <text:p text:style-name="P22">:</text:p>
          </table:table-cell>
          <table:table-cell table:style-name="Table3.A3" office:value-type="string">
            <text:p text:style-name="P41">shift-,</text:p>
          </table:table-cell>
        </table:table-row>
      </table:table>
      <text:h text:style-name="P29" text:outline-level="1"/>
      <text:h text:style-name="P32" text:outline-level="1">Examples</text:h>
      <text:p text:style-name="First_20_Paragraph"><text:span text:style-name="T43">Following are several examples of Phi phrases </text:span><text:span text:style-name="T45">in formal mode</text:span><text:span text:style-name="T43">. They are given </text:span><text:span text:style-name="T44">first </text:span><text:span text:style-name="T43">in English, then in romanized text, and finally in </text:span><text:span text:style-name="T46">the </text:span><text:span text:style-name="T43">Tengwar script.</text:span></text:p>
      <text:p text:style-name="P27">My name <text:span text:style-name="T55">is Daniel<text:line-break/></text:span><text:span text:style-name="T17">si </text:span><text:span text:style-name="T58">phiathe</text:span><text:span text:style-name="T11"> soa mia na </text:span><text:span text:style-name="T12">thanie te phi</text:span></text:p>
      <text:p text:style-name="P51"><text:span text:style-name="T95"></text:span><text:span text:style-name="T6">⸱</text:span><text:span text:style-name="T5"></text:span><text:span text:style-name="T56">⸱⸱⸱</text:span>⸱⸱</text:p>
      <text:p text:style-name="Example">I love you.</text:p>
      <text:p text:style-name="P28"><text:span text:style-name="T93">si </text:span>mia na thi te lothea</text:p>
      <text:p text:style-name="P50"><text:span text:style-name="T95"></text:span><text:span text:style-name="T6">⸱</text:span>⸱⸱<text:span text:style-name="T8">⸱⸱</text:span></text:p>
      <text:p text:style-name="Example">The sky is blue.</text:p>
      <text:p text:style-name="P28"><text:span text:style-name="T93">si </text:span>whetho na mipho te phi</text:p>
      <text:p text:style-name="P50"><text:span text:style-name="T95"></text:span><text:span text:style-name="T6">⸱</text:span><text:span text:style-name="T55"></text:span>⸱⸱⸱⸱</text:p>
      <text:p text:style-name="Example">They like food.</text:p>
      <text:p text:style-name="P28"><text:span text:style-name="T93">si </text:span>lo sha na noshea te lephe</text:p>
      <text:p text:style-name="P50"><text:span text:style-name="T95"></text:span><text:span text:style-name="T6">⸱</text:span>⸱⸱⸱⸱⸱</text:p>
      <text:p text:style-name="Example">I like it.</text:p>
      <text:p text:style-name="P28"><text:span text:style-name="T93">si </text:span>mia na sha te lephe</text:p>
      <text:p text:style-name="P50"><text:span text:style-name="T95"></text:span><text:span text:style-name="T6">⸱</text:span>⸱⸱⸱⸱</text:p>
      <text:p text:style-name="Example">I do no like green!</text:p>
      <text:p text:style-name="P28">ho <text:span text:style-name="T94">si</text:span> mia na hashe te me lephe</text:p>
      <text:p text:style-name="P50"><text:span text:style-name="T94">⸱</text:span><text:span text:style-name="T95"></text:span>⸱⸱⸱⸱⸱⸱</text:p>
      <text:p text:style-name="P24">I liked my friend.</text:p>
      <text:p text:style-name="P28"><text:span text:style-name="T93">si </text:span>mia na miwho soa mia te li lephe</text:p>
      <text:p text:style-name="P50"><text:span text:style-name="T96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28"><text:span text:style-name="T93">si </text:span>noshea na soa lo mia te phi</text:p>
      <text:p text:style-name="P49"><text:span text:style-name="T95"></text:span><text:span text:style-name="T6">⸱</text:span>⸱⸱⸱⸱⸱⸱<text:span text:style-name="T54"></text:span></text:p>
      <text:p text:style-name="Example">Our food is good.</text:p>
      <text:p text:style-name="P28"><text:span text:style-name="T93">si </text:span>noshea soa lo mia na shishoa te phi</text:p>
      <text:p text:style-name="P49"><text:span text:style-name="T7"></text:span><text:span text:style-name="T6">⸱</text:span>⸱<text:span text:style-name="T42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27"><text:span text:style-name="T93">si </text:span>wha thi na ropho shishoa te la phe</text:p>
      <text:p text:style-name="P49"><text:span text:style-name="T94">⸱</text:span><text:span text:style-name="T95"></text:span>⸱⸱⸱⸱⸱⸱<text:span text:style-name="T55"></text:span>⸱</text:p>
      <text:p text:style-name="Example">We love the orange trees.</text:p>
      <text:p text:style-name="Example"><text:span text:style-name="T93">si </text:span>lo mia na lo lipha sathe te lothea</text:p>
      <text:p text:style-name="P50"><text:span text:style-name="T95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1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/><text:span text:style-name="MT1">of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0:50:12.226000000</dc:date>
    <meta:editing-duration>PT5H30M9S</meta:editing-duration>
    <meta:editing-cycles>41</meta:editing-cycles>
    <meta:generator>LibreOffice/7.1.2.2$Windows_X86_64 LibreOffice_project/8a45595d069ef5570103caea1b71cc9d82b2aae4</meta:generator>
    <meta:print-date>2021-04-14T07:07:23.311000000</meta:print-date>
    <meta:document-statistic meta:table-count="3" meta:image-count="0" meta:object-count="0" meta:page-count="8" meta:paragraph-count="134" meta:word-count="1244" meta:character-count="5467" meta:non-whitespace-character-count="4674"/>
  </office:meta>
</office:document-meta>
</file>