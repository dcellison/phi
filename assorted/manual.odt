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2f6327" officeooo:paragraph-rsid="002f6327" style:font-style-asian="italic" style:font-style-complex="italic"/>
    </style:style>
    <style:style style:name="P2" style:family="paragraph" style:parent-style-name="Standard">
      <style:text-properties style:font-name="Palatino Linotype" fo:font-size="12pt" fo:letter-spacing="normal" officeooo:rsid="001f77fd" officeooo:paragraph-rsid="001f77fd" style:font-size-asian="10.5pt" style:font-size-complex="12pt"/>
    </style:style>
    <style:style style:name="P3" style:family="paragraph" style:parent-style-name="Standard"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4" style:family="paragraph" style:parent-style-name="Standard">
      <style:paragraph-properties fo:line-height="100%"/>
      <style:text-properties style:font-name="Palatino Linotype" fo:font-size="12pt" fo:letter-spacing="normal" officeooo:rsid="002069f4" officeooo:paragraph-rsid="002069f4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Palatino Linotype" fo:font-size="12pt" fo:letter-spacing="normal" fo:font-style="italic" officeooo:rsid="001f77fd" officeooo:paragraph-rsid="001f77fd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line-height="100%"/>
      <style:text-properties style:font-name="Palatino Linotype" fo:font-size="12pt" fo:letter-spacing="normal" fo:font-style="italic" officeooo:rsid="002069f4" officeooo:paragraph-rsid="002069f4" style:font-size-asian="10.5pt" style:font-style-asian="italic" style:font-size-complex="12pt" style:font-style-complex="italic"/>
    </style:style>
    <style:style style:name="P8" style:family="paragraph" style:parent-style-name="Standard">
      <style:text-properties style:font-name="Palatino Linotype" fo:font-size="12pt" fo:letter-spacing="normal" fo:font-style="italic" officeooo:rsid="00223347" officeooo:paragraph-rsid="00223347" style:font-size-asian="10.5pt" style:font-style-asian="italic" style:font-size-complex="12pt" style:font-style-complex="italic"/>
    </style:style>
    <style:style style:name="P9" style:family="paragraph" style:parent-style-name="Standard">
      <style:text-properties style:font-name="Palatino Linotype" fo:font-size="12pt" fo:letter-spacing="normal" fo:font-style="italic" officeooo:rsid="00232f95" officeooo:paragraph-rsid="00232f95" style:font-size-asian="10.5pt" style:font-style-asian="italic" style:font-size-complex="12pt" style:font-style-complex="italic"/>
    </style:style>
    <style:style style:name="P10" style:family="paragraph" style:parent-style-name="Standard">
      <style:text-properties style:font-name="Palatino Linotype" fo:font-size="12pt" fo:letter-spacing="normal" fo:font-style="italic" officeooo:rsid="0023afad" officeooo:paragraph-rsid="0023afad" style:font-size-asian="10.5pt" style:font-style-asian="italic" style:font-size-complex="12pt" style:font-style-complex="italic"/>
    </style:style>
    <style:style style:name="P11" style:family="paragraph" style:parent-style-name="Standard">
      <style:text-properties style:font-name="Palatino Linotype" fo:font-size="12pt" fo:letter-spacing="normal" fo:font-style="italic" officeooo:rsid="0023afad" officeooo:paragraph-rsid="002f6327" style:font-size-asian="10.5pt" style:font-style-asian="italic" style:font-size-complex="12pt" style:font-style-complex="italic"/>
    </style:style>
    <style:style style:name="P12" style:family="paragraph" style:parent-style-name="Standard">
      <style:text-properties style:font-name="Palatino Linotype" fo:font-size="12pt" fo:letter-spacing="normal" fo:font-style="normal" officeooo:rsid="002069f4" officeooo:paragraph-rsid="002069f4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Palatino Linotype" fo:font-size="12pt" fo:letter-spacing="normal" fo:font-style="normal" officeooo:rsid="00223347" officeooo:paragraph-rsid="00223347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Palatino Linotype" fo:font-size="12pt" fo:letter-spacing="normal" fo:font-style="normal" officeooo:rsid="0023afad" officeooo:paragraph-rsid="0023afad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Palatino Linotype" fo:font-size="12pt" officeooo:rsid="002aebfd" officeooo:paragraph-rsid="002aebfd" style:font-size-asian="10.5pt" style:font-size-complex="12pt"/>
    </style:style>
    <style:style style:name="P16" style:family="paragraph" style:parent-style-name="Standard">
      <style:text-properties style:font-name="Palatino Linotype" fo:font-size="8pt" fo:letter-spacing="normal" officeooo:rsid="002069f4" officeooo:paragraph-rsid="002069f4" style:font-size-asian="8pt" style:font-size-complex="8pt"/>
    </style:style>
    <style:style style:name="P17" style:family="paragraph" style:parent-style-name="Standard">
      <style:text-properties style:font-name="Palatino Linotype" fo:font-size="8pt" fo:letter-spacing="normal" fo:font-style="italic" officeooo:rsid="002069f4" officeooo:paragraph-rsid="002069f4" style:font-size-asian="8pt" style:font-style-asian="italic" style:font-size-complex="8pt" style:font-style-complex="italic"/>
    </style:style>
    <style:style style:name="P18" style:family="paragraph" style:parent-style-name="Standard">
      <style:text-properties style:font-name="Palatino Linotype" fo:font-size="8pt" fo:letter-spacing="normal" fo:font-style="normal" officeooo:rsid="00223347" officeooo:paragraph-rsid="00223347" style:font-size-asian="8pt" style:font-style-asian="normal" style:font-size-complex="8pt" style:font-style-complex="normal"/>
    </style:style>
    <style:style style:name="P19" style:family="paragraph" style:parent-style-name="Standard">
      <style:text-properties style:font-name="Palatino Linotype" fo:font-size="8pt" fo:letter-spacing="normal" fo:font-style="normal" officeooo:rsid="00232f95" officeooo:paragraph-rsid="00232f95" style:font-size-asian="8pt" style:font-style-asian="normal" style:font-size-complex="8pt" style:font-style-complex="normal"/>
    </style:style>
    <style:style style:name="P20" style:family="paragraph" style:parent-style-name="Standard">
      <style:text-properties style:font-name="Palatino Linotype" fo:font-size="8pt" fo:letter-spacing="normal" fo:font-style="normal" officeooo:rsid="0023afad" officeooo:paragraph-rsid="0023afad" style:font-size-asian="8pt" style:font-style-asian="normal" style:font-size-complex="8pt" style:font-style-complex="normal"/>
    </style:style>
    <style:style style:name="P21" style:family="paragraph" style:parent-style-name="Standard">
      <style:text-properties officeooo:rsid="002cbf0c" officeooo:paragraph-rsid="002cbf0c"/>
    </style:style>
    <style:style style:name="P22" style:family="paragraph" style:parent-style-name="Standard">
      <style:text-properties fo:font-size="8pt" style:font-size-asian="7pt" style:font-size-complex="8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Palatino Linotype" fo:font-size="24pt" fo:letter-spacing="normal" officeooo:rsid="001f77fd" officeooo:paragraph-rsid="001f77fd" style:font-size-asian="21pt" style:font-size-complex="24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Palatino Linotype" fo:font-size="12pt" fo:letter-spacing="normal" officeooo:rsid="001f77fd" officeooo:paragraph-rsid="001f77fd" style:font-size-asian="12pt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Palatino Linotype" fo:font-size="8pt" fo:letter-spacing="normal" officeooo:rsid="001f77fd" officeooo:paragraph-rsid="001f77fd" style:font-size-asian="8pt" style:font-size-complex="8pt"/>
    </style:style>
    <style:style style:name="P26" style:family="paragraph" style:parent-style-name="Standard">
      <style:paragraph-properties fo:break-before="page"/>
      <style:text-properties style:font-name="Palatino Linotype" fo:font-size="12pt" fo:letter-spacing="normal" officeooo:rsid="00232f95" officeooo:paragraph-rsid="00232f95" style:font-size-asian="10.5pt" style:font-size-complex="12pt"/>
    </style:style>
    <style:style style:name="P27" style:family="paragraph" style:parent-style-name="Standard">
      <style:paragraph-properties fo:break-before="page"/>
      <style:text-properties style:font-name="Palatino Linotype" fo:font-size="18pt" fo:letter-spacing="normal" officeooo:rsid="001f77fd" officeooo:paragraph-rsid="001f77fd" style:font-size-asian="18pt" style:font-size-complex="18pt"/>
    </style:style>
    <style:style style:name="P28" style:family="paragraph" style:parent-style-name="Standard" style:master-page-name="Standard">
      <style:paragraph-properties style:page-number="auto"/>
      <style:text-properties style:font-name="Palatino Linotype" fo:font-size="18pt" officeooo:rsid="002aebfd" officeooo:paragraph-rsid="002aebfd" style:font-size-asian="18pt" style:font-size-complex="18pt"/>
    </style:style>
    <style:style style:name="P29" style:family="paragraph" style:parent-style-name="Tengwar">
      <style:text-properties officeooo:rsid="002f6327" officeooo:paragraph-rsid="002f6327"/>
    </style:style>
    <style:style style:name="P30" style:family="paragraph" style:parent-style-name="Tengwar">
      <style:text-properties officeooo:paragraph-rsid="002f6327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Palatino Linotype" fo:font-size="24pt" fo:font-weight="normal" style:font-size-asian="21pt" style:font-weight-asian="normal" style:font-size-complex="24pt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24pt" fo:font-weight="normal" officeooo:rsid="0029415b" officeooo:paragraph-rsid="0029415b" style:font-size-asian="24pt" style:font-weight-asian="normal" style:font-size-complex="24pt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8pt" fo:font-weight="normal" officeooo:rsid="0029415b" officeooo:paragraph-rsid="0029415b" style:font-size-asian="18pt" style:font-weight-asian="normal" style:font-size-complex="18pt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8pt" fo:font-weight="normal" officeooo:rsid="0029415b" officeooo:paragraph-rsid="0029415b" style:font-size-asian="7pt" style:font-weight-asian="normal" style:font-size-complex="8pt" style:font-weight-complex="normal"/>
    </style:style>
    <style:style style:name="P3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36pt" fo:font-weight="normal" officeooo:rsid="0029415b" officeooo:paragraph-rsid="0029415b" style:font-size-asian="36pt" style:font-weight-asian="normal" style:font-size-complex="36pt" style:font-weight-complex="normal"/>
    </style:style>
    <style:style style:name="P3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alatino Linotype" fo:font-size="14pt" fo:font-weight="normal" officeooo:rsid="0029415b" officeooo:paragraph-rsid="0029415b" style:font-size-asian="14pt" style:font-weight-asian="normal" style:font-size-complex="14pt" style:font-weight-complex="normal"/>
    </style:style>
    <style:style style:name="P37" style:family="paragraph" style:parent-style-name="Title">
      <style:paragraph-properties fo:margin-top="0in" fo:margin-bottom="0in" style:contextual-spacing="false"/>
      <style:text-properties style:font-name="Palatino Linotype" fo:font-size="96pt" fo:font-weight="normal" officeooo:paragraph-rsid="002a6fea" style:font-size-asian="96pt" style:font-weight-asian="normal" style:font-size-complex="96pt" style:font-weight-complex="normal"/>
    </style:style>
    <style:style style:name="P38" style:family="paragraph" style:parent-style-name="Title" style:master-page-name="First_20_Page">
      <style:paragraph-properties fo:margin-top="0in" fo:margin-bottom="0in" style:contextual-spacing="false" style:page-number="auto"/>
      <style:text-properties style:font-name="Palatino Linotype" fo:font-size="36pt" fo:font-weight="normal" officeooo:paragraph-rsid="002a6fea" style:font-size-asian="31.5pt" style:font-weight-asian="normal" style:font-size-complex="36pt" style:font-weight-complex="normal"/>
    </style:style>
    <style:style style:name="T1" style:family="text">
      <style:text-properties style:font-name="Tengwar Telcontar1" fo:font-size="22pt" fo:letter-spacing="normal" fo:font-style="normal" officeooo:rsid="002f6327" style:font-size-asian="22pt" style:font-style-asian="normal" style:font-size-complex="22pt" style:font-style-complex="normal"/>
    </style:style>
    <style:style style:name="T2" style:family="text">
      <style:text-properties officeooo:rsid="001f77f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bf0c" style:font-style-asian="italic" style:font-style-complex="italic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32f95" style:font-style-asian="normal" style:font-style-complex="normal"/>
    </style:style>
    <style:style style:name="T8" style:family="text">
      <style:text-properties fo:font-style="normal" officeooo:rsid="002b0442" style:font-style-asian="normal" style:font-style-complex="normal"/>
    </style:style>
    <style:style style:name="T9" style:family="text">
      <style:text-properties fo:font-style="normal" officeooo:rsid="002f6327" style:font-style-asian="normal" style:font-style-complex="normal"/>
    </style:style>
    <style:style style:name="T10" style:family="text">
      <style:text-properties officeooo:rsid="0023afad"/>
    </style:style>
    <style:style style:name="T11" style:family="text">
      <style:text-properties style:font-name="Palatino Linotype" fo:font-size="12pt" fo:letter-spacing="normal" fo:font-style="normal" officeooo:rsid="00232f95" style:font-size-asian="10.5pt" style:font-style-asian="normal" style:font-size-complex="12pt" style:font-style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28e509"/>
    </style:style>
    <style:style style:name="T14" style:family="text">
      <style:text-properties fo:color="#6089b4" loext:opacity="100%"/>
    </style:style>
    <style:style style:name="T15" style:family="text">
      <style:text-properties officeooo:rsid="002b0442"/>
    </style:style>
    <style:style style:name="T16" style:family="text">
      <style:text-properties fo:color="#9872a2" loext:opacity="100%"/>
    </style:style>
    <style:style style:name="T17" style:family="text">
      <style:text-properties officeooo:rsid="002cbf0c"/>
    </style:style>
    <style:style style:name="T18" style:family="text">
      <style:text-properties officeooo:rsid="002f6327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7">φ</text:p>
      <text:p text:style-name="P31"/>
      <text:p text:style-name="P35">Phi</text:p>
      <text:p text:style-name="P33">A constructed language</text:p>
      <text:p text:style-name="P32"/>
      <text:p text:style-name="P36">Daniel Ellison</text:p>
      <text:p text:style-name="P34"/>
      <text:p text:style-name="P36"><text:date style:data-style-name="N75" text:date-value="2021-04-12T17:37:21.785999969" text:fixed="true">Apr 12, 2021</text:date></text:p>
      <text:p text:style-name="P28">1. Introduction</text:p>
      <text:p text:style-name="P15"/>
      <text:p text:style-name="P15">Phi is a constructed language. Its name embodies the simplicity and softness of the language itself. <text:span text:style-name="T3">Phi</text:span><text:span text:style-name="T6"> (Φ) is also beauty in mathematics. It is</text:span></text:p>
      <text:p text:style-name="P15"><text:span text:style-name="T6"/></text:p>
      <text:p text:style-name="Pull_20_Quote">“the golden ratio, an irrational number with a value of approximately 1.618033988 which expresses the relationship that the sum of two quantities is to the larger quantity as the larger is to the smaller.”<text:span text:style-name="T6"> – </text:span><text:span text:style-name="T8">Wiktionary</text:span></text:p>
      <text:p text:style-name="Indented">It is thought that the value of <text:span text:style-name="T4">p</text:span><text:span text:style-name="T3">hi</text:span> is one of the fundamental characteristics of nature; in the language Phi, nature is fundamental to its being. Listening to spoken Phi one can be reminded of the sounds of the natural world. There is also a musicality and rhythm to sentences in the language.</text:p>
      <text:p text:style-name="P27">2. Examples</text:p>
      <text:p text:style-name="P2"/>
      <text:p text:style-name="P23"><text:span text:style-name="T5">Following are several examples of Phi phrases. They are given in English, then in romanized text, and finally in the Tengwar script of J.R.R. Tolkien.</text:span></text:p>
      <text:p text:style-name="P25"/>
      <text:p text:style-name="Standard">My name <text:span text:style-name="T18">is Daniel</text:span></text:p>
      <text:p text:style-name="P1">thanie te phi</text:p>
      <text:p text:style-name="P29">⸱⸱</text:p>
      <text:p text:style-name="Standard"/>
      <text:p text:style-name="P24">I love you.</text:p>
      <text:p text:style-name="P5">mia na thi te lothea</text:p>
      <text:p text:style-name="Tengwar">⸱⸱<text:span text:style-name="T2">⸱⸱</text:span></text:p>
      <text:p text:style-name="P4"><text:span text:style-name="T12"><text:line-break/></text:span>The sky is blue.</text:p>
      <text:p text:style-name="P7">whetho na mipho te phi</text:p>
      <text:p text:style-name="Tengwar"><text:span text:style-name="T18"></text:span>⸱⸱⸱⸱</text:p>
      <text:p text:style-name="P16"/>
      <text:p text:style-name="P3">They like food.</text:p>
      <text:p text:style-name="P6">lo sha na noshea te lephe</text:p>
      <text:p text:style-name="Tengwar">⸱⸱⸱⸱⸱</text:p>
      <text:p text:style-name="P17"><text:span text:style-name="T6"/></text:p>
      <text:p text:style-name="P12">I like it.</text:p>
      <text:p text:style-name="P6">mia na sha te lephe</text:p>
      <text:p text:style-name="Tengwar">⸱⸱⸱⸱</text:p>
      <text:p text:style-name="P18"/>
      <text:p text:style-name="P13">I do no like green!</text:p>
      <text:p text:style-name="P8">ho mia na hashe te me lephe</text:p>
      <text:p text:style-name="Tengwar">⸱⸱⸱⸱⸱⸱</text:p>
      <text:p text:style-name="P18"/>
      <text:p text:style-name="P13">I liked my friend.</text:p>
      <text:p text:style-name="P8">mia na miwho soa mia te li lephe</text:p>
      <text:p text:style-name="Tengwar"><text:span text:style-name="T6">⸱⸱</text:span><text:span text:style-name="T9"></text:span><text:span text:style-name="T1"></text:span><text:span text:style-name="T7">⸱</text:span><text:span text:style-name="T6">⸱⸱</text:span><text:span text:style-name="T7">⸱</text:span><text:span text:style-name="T6">⸱</text:span></text:p>
      <text:p text:style-name="P26">The food is ours.</text:p>
      <text:p text:style-name="P9">noshea na soa lo mia te phi</text:p>
      <text:p text:style-name="P30">⸱⸱⸱⸱⸱⸱<text:span text:style-name="T13"></text:span></text:p>
      <text:p text:style-name="P22"/>
      <text:p text:style-name="P30"><text:span text:style-name="T11">Our food is good.</text:span></text:p>
      <text:p text:style-name="P9">noshea soa lo mia na shishoa te phi</text:p>
      <text:p text:style-name="Tengwar">⸱<text:span text:style-name="T10"></text:span>⸱⸱⁘⁘⸱⸱</text:p>
      <text:p text:style-name="P19"/>
      <text:p text:style-name="P14">Are you in good health?</text:p>
      <text:p text:style-name="P11">wha thi na ropho shishoa te la phe</text:p>
      <text:p text:style-name="Tengwar">⸱⸱⸱⸱⸱⸱<text:span text:style-name="T18"></text:span>⸱</text:p>
      <text:p text:style-name="P20"/>
      <text:p text:style-name="P14">We love the orange trees.</text:p>
      <text:p text:style-name="P10">lo mia na lo lipha sathe te lothea</text:p>
      <text:p text:style-name="Tengwar">⸱⸱⸱⸱⸱⸱⸱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agmataPro, Consolas," svg:font-family="'PragmataPro, Consolas,', 'Courier New', ', monospace', Consolas, 'Courier New', monospace"/>
    <style:font-face style:name="sans-serif" svg:font-family="sans-serif"/>
    <style:font-face style:name="Arial1" svg:font-family="Arial" style:font-family-generic="swiss"/>
    <style:font-face style:name="Tengwar Telcontar1" svg:font-family="'Tengwar Telcontar'" style:font-pitch="variable"/>
    <style:font-face style:name="Tengwar Telcontar:caps=1" svg:font-family="'Tengwar Telcontar:caps=1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engwar Telcontar" svg:font-family="'Tengwar Telcont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alatino Linotype1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02in" fo:margin-right="0.75in" fo:margin-top="0in" fo:margin-bottom="0.1965in" style:contextual-spacing="false" fo:text-indent="0in" style:auto-text-indent="false"/>
      <style:text-properties style:font-name="Palatino Linotype" fo:font-family="'Palatino Linotype'" style:font-family-generic="roman" style:font-pitch="variable" fo:font-style="italic" style:font-style-asian="italic" style:font-style-complex="italic"/>
    </style:style>
    <style:style style:name="Pull_20_Quote" style:display-name="Pull Quote" style:family="paragraph" style:parent-style-name="Quotations" style:master-page-name="">
      <style:paragraph-properties fo:margin-left="0.3299in" fo:margin-right="0.3299in" fo:text-indent="0in" style:auto-text-indent="false" style:page-number="auto">
        <style:tab-stops/>
      </style:paragraph-properties>
    </style:style>
    <style:style style:name="Tengwar" style:family="paragraph" style:parent-style-name="Standard">
      <style:paragraph-properties fo:line-height="100%"/>
      <style:text-properties style:font-name="Tengwar Telcontar1" fo:font-family="'Tengwar Telcontar'" style:font-pitch="variable" fo:font-size="22pt" fo:letter-spacing="normal" officeooo:rsid="00140535" style:font-size-asian="22pt" style:font-size-complex="22pt"/>
    </style:style>
    <style:style style:name="Indented" style:family="paragraph" style:parent-style-name="Standard">
      <style:paragraph-properties fo:margin-left="0in" fo:margin-right="0in" fo:text-indent="0.2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23:46.713000000</meta:creation-date>
    <dc:date>2021-04-12T18:43:18.340000000</dc:date>
    <meta:editing-duration>PT31M14S</meta:editing-duration>
    <meta:editing-cycles>6</meta:editing-cycles>
    <meta:generator>LibreOffice/7.1.2.2$Windows_X86_64 LibreOffice_project/8a45595d069ef5570103caea1b71cc9d82b2aae4</meta:generator>
    <meta:print-date>2021-04-12T18:20:44.404000000</meta:print-date>
    <meta:document-statistic meta:table-count="0" meta:image-count="0" meta:object-count="0" meta:page-count="4" meta:paragraph-count="44" meta:word-count="522" meta:character-count="1617" meta:non-whitespace-character-count="1382"/>
  </office:meta>
</office:document-meta>
</file>